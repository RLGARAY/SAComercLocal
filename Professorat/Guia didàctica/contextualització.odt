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94a9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paragraph-rsid="00094a90"/>
    </style:style>
    <style:style style:name="P5" style:family="paragraph" style:parent-style-name="Text_20_body">
      <style:text-properties officeooo:paragraph-rsid="00094a90"/>
    </style:style>
    <style:style style:name="P6" style:family="paragraph" style:parent-style-name="Text_20_body" style:list-style-name="L2">
      <style:text-properties officeooo:paragraph-rsid="000a82a1"/>
    </style:style>
    <style:style style:name="P7" style:family="paragraph" style:parent-style-name="Text_20_body" style:list-style-name="L3"/>
    <style:style style:name="P8" style:family="paragraph" style:parent-style-name="Text_20_body">
      <style:text-properties officeooo:rsid="000db462" officeooo:paragraph-rsid="000db462"/>
    </style:style>
    <style:style style:name="P9" style:family="paragraph" style:parent-style-name="Text_20_body" style:list-style-name="L4">
      <style:text-properties officeooo:rsid="000db462" officeooo:paragraph-rsid="000db462"/>
    </style:style>
    <style:style style:name="P10" style:family="paragraph" style:parent-style-name="Text_20_body" style:list-style-name="L5">
      <style:text-properties officeooo:paragraph-rsid="000fee27"/>
    </style:style>
    <style:style style:name="T1" style:family="text">
      <style:text-properties officeooo:rsid="000fee2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3" text:outline-level="3">Context del mòdul</text:h>
      <text:p text:style-name="Text_20_body">Aquest mòdul formatiu es desenvolupa al centre públic Jaume II el Just, situat a Tavernes de la Valldigna.</text:p>
      <text:p text:style-name="Text_20_body">La localitat es troba en ple procés de creixement i transformació, amb una població de 17.866 habitants segons dades de l’INE (2025). En els últims anys, ha experimentat un increment notable de la immigració, principalment procedent del nord d’Àfrica, de països de l’est d’Europa, d’Amèrica del Sud, de la Xina i d’altres regions. Sovint, aquestes persones no disposen d’estudis superiors ni de qualificacions professionals.</text:p>
      <text:h text:style-name="Heading_20_3" text:outline-level="3">Entorn socioeconòmic</text:h>
      <text:p text:style-name="Text_20_body">El municipi, gràcies a la seua ubicació —a 54 km de València i a 12 km de Gandia—, compta amb un ampli nombre d’empreses del sector serveis que donen suport al teixit industrial tant de la zona com de la província.</text:p>
      <text:p text:style-name="Text_20_body">Davant d’aquesta situació, s’observa una demanda cada vegada més gran de professionals amb capacitat per desenvolupar aplicacions informàtiques, tant per part de les indústries com de les empreses de serveis.</text:p>
      <text:p text:style-name="Text_20_body"/>
      <text:h text:style-name="Heading_20_3" text:outline-level="3">Recursos i instal·lacions del centre</text:h>
      <text:p text:style-name="Text_20_body">El departament de la família professional d’Informàtica i Comunicacions compta amb:</text:p>
      <text:list text:style-name="L1">
        <text:list-item>
          <text:p text:style-name="P2">Una aula taller</text:p>
        </text:list-item>
        <text:list-item>
          <text:p text:style-name="P2">Quinze aules d’informàtica</text:p>
        </text:list-item>
        <text:list-item>
          <text:p text:style-name="P2">Tres aules matèria equipades amb un ordinador per estudiant</text:p>
        </text:list-item>
        <text:list-item>
          <text:p text:style-name="P2">Biblioteca</text:p>
        </text:list-item>
        <text:list-item>
          <text:p text:style-name="P2">Gimnàs</text:p>
        </text:list-item>
        <text:list-item>
          <text:p text:style-name="P2">Aula d’exàmens</text:p>
        </text:list-item>
        <text:list-item>
          <text:p text:style-name="P2">Aula multiusos</text:p>
        </text:list-item>
        <text:list-item>
          <text:p text:style-name="P2">Dues aules de tecnologia</text:p>
        </text:list-item>
        <text:list-item>
          <text:p text:style-name="P2">Pati de grans dimensions</text:p>
          <text:p text:style-name="P2"/>
          <text:p text:style-name="P2"/>
        </text:list-item>
      </text:list>
      <text:p text:style-name="Text_20_body"/>
      <text:p text:style-name="Text_20_body"/>
      <text:p text:style-name="Text_20_body"/>
      <text:h text:style-name="Heading_20_3" text:outline-level="3"><text:soft-page-break/>Oferta educativa</text:h>
      <text:p text:style-name="Text_20_body">La informàtica està present en tots els nivells d’ESO i Batxillerat en forma d’assignatures optatives.</text:p>
      <text:p text:style-name="Text_20_body">Pel que fa a la Formació Professional, el centre ofereix una àmplia varietat d’estudis en tots els nivells:</text:p>
      <text:p text:style-name="Text_20_body">Formació Professional Bàsica (FPB)</text:p>
      <text:list text:style-name="L2">
        <text:list-item>
          <text:p text:style-name="P3">Informàtica d’Oficina</text:p>
        </text:list-item>
      </text:list>
      <text:p text:style-name="Text_20_body">Cicle Formatiu de Grau Mitjà:</text:p>
      <text:list text:continue-numbering="true" text:style-name="L2">
        <text:list-item>
          <text:p text:style-name="P4">Sistemes Microinformàtics i Xarxes (SMR)</text:p>
        </text:list-item>
      </text:list>
      <text:p text:style-name="P5">Cicles Formatius de Grau Superior:</text:p>
      <text:list text:continue-numbering="true" text:style-name="L2">
        <text:list-item>
          <text:p text:style-name="P4">Administració de Sistemes Informàtics en Xarxa (ASIR)</text:p>
        </text:list-item>
        <text:list-item>
          <text:p text:style-name="P6">Desenvolupament d’Aplicacions Multiplataforma (DAM) </text:p>
        </text:list-item>
        <text:list-item>
          <text:p text:style-name="P4">Desenvolupament d’Aplicacions Web (DAW)</text:p>
          <text:p text:style-name="P4"/>
        </text:list-item>
      </text:list>
      <text:p text:style-name="Text_20_body">A més, disposa també de dos cicles d’especialització en: </text:p>
      <text:list text:style-name="L3">
        <text:list-item>
          <text:p text:style-name="P7">Ciberseguretat</text:p>
        </text:list-item>
        <text:list-item>
          <text:p text:style-name="P7">Intel·ligència Artificial i Big Data</text:p>
        </text:list-item>
      </text:list>
      <text:p text:style-name="Text_20_body"/>
      <text:p text:style-name="Text_20_body">Aquesta oferta formativa permet abastar pràcticament tots els itineraris de la família professional d’Informàtica i Comunicacions. </text:p>
      <text:h text:style-name="Heading_20_3" text:outline-level="3">Justificació pedagògica</text:h>
      <text:p text:style-name="P8">El projecte és pertinent i altament beneficiós per a l’alumnat del cicle de Desenvolupament d’Aplicacions Web (DAW) per les següents raons fonamentals:</text:p>
      <text:list text:style-name="L4">
        <text:list-item>
          <text:p text:style-name="P9">Connexió amb l'entorn socioeconòmic real: Tavernes de la Valldigna es troba en un procés de transformació amb una demanda creixent de professionals capaços de desenvolupar aplicacions informàtiques per al sector serveis i industrial. En crear una web per promoure el comerç local, l'alumnat no només adquireix habilitats tècniques, sinó que intervé directament en la dinamització de la seua pròpia localitat</text:p>
        </text:list-item>
        <text:list-item>
          <text:p text:style-name="P9">Assoliment integral del currículum: El projecte està dissenyat per cobrir de forma pràctica els Resultats d'Aprenentatge (RA) del mòdul de Desenvolupament Web en Entorn Client. Permet treballar des de la selecció d'arquitectures i tecnologies fins a la programació d'estructures complexes i la comunicació asíncrona</text:p>
        </text:list-item>
        <text:list-item>
          <text:p text:style-name="P9">Desenvolupament de competències tècniques clau:</text:p>
          <text:list>
            <text:list-item>
              <text:p text:style-name="P9">Interactivitat i experiència d'usuari: L'alumnat aprèn a gestionar esdeveniments, manipular el Model d'Objectes del Document (DOM) i utilitzar objectes predefinits per interactuar amb l'usuari final de la web</text:p>
            </text:list-item>
            <text:list-item>
              <text:p text:style-name="P9"><text:soft-page-break/>Comunicació Asíncrona: La implementació de buscadors i desplegables dinàmics obliga a l'ús de mecanismes de comunicació entre client i servidor, una competència essencial en el mercat laboral actual</text:p>
            </text:list-item>
            <text:list-item>
              <text:p text:style-name="P9">Qualitat del programari: El projecte fomenta l'ús d'eines professionals com GitHub i la importància de la depuració i documentació del codi</text:p>
            </text:list-item>
          </text:list>
        </text:list-item>
        <text:list-item>
          <text:p text:style-name="P9">Aprenentatge significatiu i motivació: En lloc de realitzar exercicis aïllats, l'estudiant desenvolupa un producte final tangible que mostra informació real (horaris, telèfons, descripcions de productes). Això augmenta la motivació en veure la utilitat directa del seu treball per a la comunitat</text:p>
        </text:list-item>
        <text:list-item>
          <text:p text:style-name="P9">Aprofitament de recursos d'avantguarda: El centre Jaume II el Just disposa d'una infraestructura d'aules d'informàtica i tallers que permeten un seguiment individualitzat i l'ús de tecnologies de programació avançades en un entorn professional</text:p>
        </text:list-item>
      </text:list>
      <text:p text:style-name="P8"/>
      <text:p text:style-name="P8">En conclusió, aquest projecte és una eina pedagògica potent que transforma l'aula en un espai de simulació professional, preparant els alumnes per a la demanda real de les empreses de la zona mentre contribueixen al benestar social del seu municipi</text:p>
      <text:p text:style-name="P8"/>
      <text:h text:style-name="Heading_20_3" text:outline-level="3">Marc normatiu</text:h>
      <text:p text:style-name="Text_20_body">La competència general de DAW consisteix a desenvolupar, implantar i mantenir aplicacions web, amb independència del <text:s/>model emprat i utilitzant tecnologies específiques, garantint l’accés a les dades de manera segura i complint els criteris d’accessibilitat, usabilitat i qualitat exigits pels estàndards establerts (Reial decret 686/2010).</text:p>
      <text:p text:style-name="Text_20_body"/>
      <text:p text:style-name="Text_20_body"><text:span text:style-name="T1">El projecte educatiu</text:span> està referencia<text:span text:style-name="T1">t</text:span> per la següent legislació estatal, autonòmica i del centre educatiu IES <text:span text:style-name="T1">Jaume II El Just</text:span>:</text:p>
      <text:p text:style-name="Text_20_body"/>
      <text:list text:style-name="L5">
        <text:list-item>
          <text:p text:style-name="P10">Estatal:</text:p>
          <text:list>
            <text:list-item>
              <text:p text:style-name="P10">LOE (Llei orgànica 2/2006), que fa referència a la Formació Professional Específica en els seus articles 39 a 44. Està modificada per la LOMLOE (Llei orgànica 3/2020).</text:p>
            </text:list-item>
            <text:list-item>
              <text:p text:style-name="P10">Ordenació i integració de la Formació Professional (Llei orgànica 3/2022).</text:p>
            </text:list-item>
            <text:list-item>
              <text:p text:style-name="P10">Ordenació del Sistema de Formació Professional (Reial decret 659/2023).</text:p>
            </text:list-item>
            <text:list-item>
              <text:p text:style-name="P10">Títol de Tècnic Superior en Desenvolupament d’Aplicacions Web (Reial decret 686/2010). Modificat per “Actualització del títol de Tècnic Superior en Desenvolupament d’Aplicacions Web (Reial decret 405/2023)” i “Modificació de reials decrets de títols de Formació Professional de grau superior (Reial decret 500/2024)”.</text:p>
            </text:list-item>
            <text:list-item>
              <text:p text:style-name="P10">Currículum del títol de Tècnic Superior en Desenvolupament d’Aplicacions Web (Ordre EDU/2887/2010).</text:p>
            </text:list-item>
            <text:list-item>
              <text:p text:style-name="P10"><text:soft-page-break/>Mòduls professionals optatius de Formació Professional (Disposició 14439).</text:p>
            </text:list-item>
          </text:list>
        </text:list-item>
        <text:list-item>
          <text:p text:style-name="P10">Autonòmic:</text:p>
          <text:list>
            <text:list-item>
              <text:p text:style-name="P10">Principis d’equitat i d’inclusió en el sistema educatiu valencià (Decret 104/2018).</text:p>
            </text:list-item>
            <text:list-item>
              <text:p text:style-name="P10">Regulació de l’organització de la resposta educativa per a la inclusió de l’alumnat en els centres docents (Ordre 20/2019).</text:p>
            </text:list-item>
            <text:list-item>
              <text:p text:style-name="P10">Regulació de l’avaluació del procés d’ensenyament-aprenentatge en cicles formatius (Ordre 8/2025).</text:p>
            </text:list-item>
            <text:list-item>
              <text:p text:style-name="P10">Currículums dels cicles formatius de grau mitjà i superior de Formació Professional (Decret 114/2025).</text:p>
            </text:list-item>
            <text:list-item>
              <text:p text:style-name="P10"><text:span text:style-name="T1">I</text:span>nstruccions sobre l’ordenació acadèmica i d’organització dels centres que imparteixen Educació Infantil de segon cicle i Educació (Resolució de 17 de juliol de 2025)</text:p>
            </text:list-item>
          </text:list>
        </text:list-item>
        <text:list-item>
          <text:p text:style-name="P10">Centre educatiu:</text:p>
          <text:list>
            <text:list-item>
              <text:p text:style-name="P10">Projecte Educatiu de Centre (PEC de l’IES <text:span text:style-name="T1">Jaume II El Just</text:span>, 202<text:span text:style-name="T1">4</text:span>).</text:p>
            </text:list-item>
          </text:list>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4T09:59:06.642519000</meta:creation-date>
    <dc:date>2026-04-27T11:04:40.332399700</dc:date>
    <meta:editing-duration>P3DT55M10S</meta:editing-duration>
    <meta:editing-cycles>7</meta:editing-cycles>
    <meta:generator>LibreOffice/25.8.4.2$Windows_X86_64 LibreOffice_project/290daaa01b999472f0c7a3890eb6a550fd74c6df</meta:generator>
    <meta:print-date>2026-04-27T10:04:48.146008500</meta:print-date>
    <meta:printed-by>Archivos PDF</meta:printed-by>
    <meta:document-statistic meta:table-count="0" meta:image-count="0" meta:object-count="0" meta:page-count="4" meta:paragraph-count="64" meta:word-count="942" meta:character-count="6335" meta:non-whitespace-character-count="5493"/>
  </office:meta>
</office:document-meta>
</file>