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fo:margin-top="0.499cm" fo:margin-bottom="0.199cm" table:align="margins" fo:background-color="transparent" fo:keep-with-next="always" style:may-break-between-rows="true" table:border-model="collapsing">
        <style:background-image/>
      </style:table-properties>
    </style:style>
    <style:style style:name="Tabla1.A" style:family="table-column">
      <style:table-column-properties style:column-width="1.499cm" style:rel-column-width="5779*"/>
    </style:style>
    <style:style style:name="Tabla1.B" style:family="table-column">
      <style:table-column-properties style:column-width="5.3cm" style:rel-column-width="20432*"/>
    </style:style>
    <style:style style:name="Tabla1.C" style:family="table-column">
      <style:table-column-properties style:column-width="2.307cm" style:rel-column-width="8893*"/>
    </style:style>
    <style:style style:name="Tabla1.D" style:family="table-column">
      <style:table-column-properties style:column-width="6.283cm" style:rel-column-width="24220*"/>
    </style:style>
    <style:style style:name="Tabla1.E" style:family="table-column">
      <style:table-column-properties style:column-width="1.61cm" style:rel-column-width="6211*"/>
    </style:style>
    <style:style style:name="Tabla1.1" style:family="table-row">
      <style:table-row-properties style:min-row-height="1.302cm" fo:background-color="transparent" fo:keep-together="auto">
        <style:background-image/>
      </style:table-row-properties>
    </style:style>
    <style:style style:name="Tabla1.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1.2" style:family="table-row">
      <style:table-row-properties style:min-row-height="1.249cm" fo:keep-together="auto"/>
    </style:style>
    <style:style style:name="Tabla1.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1.C2" style:family="table-cell" style:data-style-name="N10000">
      <style:table-cell-properties style:vertical-align="middle" fo:background-color="#eeeeee" fo:padding="0cm" fo:border-left="none" fo:border-right="none" fo:border-top="none" fo:border-bottom="0.75pt solid #999999" style:writing-mode="page">
        <style:background-image/>
      </style:table-cell-properties>
    </style:style>
    <style:style style:name="Tabla1.3" style:family="table-row">
      <style:table-row-properties style:min-row-height="1.411cm" fo:background-color="transparent" fo:keep-together="auto">
        <style:background-image/>
      </style:table-row-properties>
    </style:style>
    <style:style style:name="Tabla1.A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B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C3" style:family="table-cell" style:data-style-name="N10000">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D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E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4" style:family="table-row">
      <style:table-row-properties style:min-row-height="1.256cm" fo:keep-together="auto"/>
    </style:style>
    <style:style style:name="Tabla1.5" style:family="table-row">
      <style:table-row-properties fo:background-color="transparent" fo:keep-together="auto">
        <style:background-image/>
      </style:table-row-properties>
    </style:style>
    <style:style style:name="Tabla1.A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B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D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E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6" style:family="table-row">
      <style:table-row-properties fo:background-color="transparent" fo:keep-together="auto">
        <style:background-image/>
      </style:table-row-properties>
    </style:style>
    <style:style style:name="Tabla1.A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B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C6" style:family="table-cell" style:data-style-name="N10000">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D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E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Standard">
      <style:text-properties style:font-name="Liberation Serif"/>
    </style:style>
    <style:style style:name="P4" style:family="paragraph" style:parent-style-name="Standard">
      <style:text-properties style:font-name="Liberation Serif" officeooo:paragraph-rsid="001ce883"/>
    </style:style>
    <style:style style:name="P5" style:family="paragraph" style:parent-style-name="Standard">
      <style:text-properties style:font-name="Liberation Serif" officeooo:paragraph-rsid="001e0376"/>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deebd" officeooo:paragraph-rsid="001deeb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1deebd" officeooo:paragraph-rsid="001deebd"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24b1ad" officeooo:paragraph-rsid="0024b1ad"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25a9bf" officeooo:paragraph-rsid="0025a9bf"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Heading_20_1">
      <style:paragraph-properties fo:text-align="center" style:justify-single-word="false"/>
      <style:text-properties officeooo:paragraph-rsid="0023ff4d"/>
    </style:style>
    <style:style style:name="P13" style:family="paragraph" style:parent-style-name="Heading_20_2">
      <style:paragraph-properties fo:break-before="page"/>
    </style:style>
    <style:style style:name="P14" style:family="paragraph" style:parent-style-name="Heading_20_4">
      <style:paragraph-properties fo:break-before="page"/>
    </style:style>
    <style:style style:name="P15" style:family="paragraph" style:parent-style-name="Standard">
      <style:text-properties style:font-name="Liberation Serif"/>
    </style:style>
    <style:style style:name="P16" style:family="paragraph" style:parent-style-name="Standard">
      <style:text-properties style:font-name="Liberation Serif" style:rfc-language-tag="ca-ES-valencia" fo:language="ca" fo:country="ES" officeooo:paragraph-rsid="002b4667"/>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deebd" officeooo:paragraph-rsid="002b4667"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list-style-name="L3"/>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4"/>
    <style:style style:name="P23" style:family="paragraph" style:parent-style-name="Text_20_body">
      <style:paragraph-properties fo:break-before="page"/>
    </style:style>
    <style:style style:name="T1" style:family="text">
      <style:text-properties officeooo:rsid="001a9e50"/>
    </style:style>
    <style:style style:name="T2" style:family="text">
      <style:text-properties officeooo:rsid="001ae3f1"/>
    </style:style>
    <style:style style:name="T3" style:family="text">
      <style:text-properties officeooo:rsid="001bd8e1"/>
    </style:style>
    <style:style style:name="T4" style:family="text">
      <style:text-properties officeooo:rsid="001ce883"/>
    </style:style>
    <style:style style:name="T5" style:family="text">
      <style:text-properties officeooo:rsid="001deebd"/>
    </style:style>
    <style:style style:name="T6" style:family="text">
      <style:text-properties officeooo:rsid="001e0376"/>
    </style:style>
    <style:style style:name="T7" style:family="text">
      <style:text-properties officeooo:rsid="001ec616"/>
    </style:style>
    <style:style style:name="T8" style:family="text">
      <style:text-properties officeooo:rsid="0020965f"/>
    </style:style>
    <style:style style:name="T9" style:family="text">
      <style:text-properties officeooo:rsid="00214e68"/>
    </style:style>
    <style:style style:name="T10" style:family="text">
      <style:text-properties officeooo:rsid="0023032d"/>
    </style:style>
    <style:style style:name="T11" style:family="text">
      <style:text-properties officeooo:rsid="0023ff4d"/>
    </style:style>
    <style:style style:name="T12" style:family="text">
      <style:text-properties officeooo:rsid="0024524b"/>
    </style:style>
    <style:style style:name="T13" style:family="text">
      <style:text-properties officeooo:rsid="0024b1ad"/>
    </style:style>
    <style:style style:name="T14" style:family="text">
      <style:text-properties officeooo:rsid="0027948b"/>
    </style:style>
    <style:style style:name="T15" style:family="text">
      <style:text-properties officeooo:rsid="002808dc"/>
    </style:style>
    <style:style style:name="T16" style:family="text">
      <style:text-properties style:font-name="Liberation Serif"/>
    </style:style>
    <style:style style:name="T17" style:family="text">
      <style:text-properties style:font-name="Liberation Serif" officeooo:rsid="001a9e50"/>
    </style:style>
    <style:style style:name="T18" style:family="text">
      <style:text-properties style:font-name="Liberation Serif" officeooo:rsid="001ae3f1"/>
    </style:style>
    <style:style style:name="T19" style:family="text">
      <style:text-properties style:font-name="Liberation Serif" officeooo:rsid="0029cff1"/>
    </style:style>
    <style:style style:name="T20" style:family="text">
      <style:text-properties officeooo:rsid="0029cff1"/>
    </style:style>
    <style:style style:name="T21" style:family="text">
      <style:text-properties officeooo:rsid="002b466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M</text:span>etodologia.</text:h>
      <text:h text:style-name="Heading_20_3" text:outline-level="3">Enfocament metodològic general.</text:h>
      <text:p text:style-name="Text_20_body">El projecte s'<text:span text:style-name="T2">organitza</text:span> sobre una <text:span text:style-name="T13">triple</text:span> metodologia complementària, l'Aprenentatge Basat en Projectes (ABP) com a marc pedagògic global, l'Aprenentatge Basat en <text:span text:style-name="T13">Serveis</text:span> (AB<text:span text:style-name="T13">S</text:span>) <text:span text:style-name="T15">com a dimensió comunitària</text:span> i <text:span text:style-name="T15">compromís social i</text:span> <text:span text:style-name="T21">Agile</text:span> com a metodologia de gestió i organització del treball.</text:p>
      <text:p text:style-name="Text_20_body"><text:span text:style-name="T16">Aquesta combinació permet que l'alumnat aprenga els continguts tècnics del mòdul en un context real i significatiu, </text:span><text:span text:style-name="T17">al mateix temps</text:span><text:span text:style-name="T16"> que adquireix competències professionals transversals pròpies del sector </text:span>i desenvolupa una consciència del paper que la tecnologia pot jugar en la millora de l'entorn proper<text:span text:style-name="T16">.</text:span></text:p>
      <text:p text:style-name="Text_20_body"><text:span text:style-name="T18">E</text:span><text:span text:style-name="T16">l desenvolupament </text:span><text:span text:style-name="T18">del projecte </text:span><text:span text:style-name="T16">d'una web per a promoure el comerç local actua com a fil conductor </text:span><text:span text:style-name="T18">al llarg </text:span><text:span text:style-name="T16">de</text:span><text:span text:style-name="T18">l</text:span><text:span text:style-name="T16"> procés d’aprenentatge. No es tracta d'exercicis aïllats, sinó d'un producte </text:span><text:span text:style-name="T18">final </text:span><text:span text:style-name="T16">que </text:span><text:span text:style-name="T18">va </text:span><text:span text:style-name="T16">creix</text:span><text:span text:style-name="T18">ent</text:span><text:span text:style-name="T16"> al llarg de les setmanes, </text:span>que té un destinatari real i que genera un impacte tangible en la comunitat, <text:span text:style-name="T17">la qual </text:span><text:span text:style-name="T16">cosa do</text:span><text:span text:style-name="T17">na</text:span><text:span text:style-name="T16"> sentit i motivació </text:span><text:span text:style-name="T17">a</text:span><text:span text:style-name="T16"> cada nou contingut treballat.</text:span></text:p>
      <text:h text:style-name="Heading_20_3" text:outline-level="3">Aprenentatge Basat en Projectes (ABP)</text:h>
      <text:p text:style-name="Text_20_body">L'<text:span text:style-name="T2">aprenentatge basat en projectes </text:span>planteja <text:span text:style-name="T20">com a</text:span> repte <text:span text:style-name="T20">inicial a</text:span>judar <text:span text:style-name="T2">al</text:span> comerç <text:span text:style-name="T20">local </text:span>a ser més visible. <text:span text:style-name="T20">En base a </text:span>aquesta <text:span text:style-name="T20">premissa</text:span>, l'alumnat ha de prendre decisions, investigar solucions, aplicar <text:span text:style-name="T2">els </text:span>continguts <text:span text:style-name="T2">de la matèria, a més de</text:span> defensar les seues decisions davant dels companys i el <text:span text:style-name="T2">professor</text:span>.</text:p>
      <text:p text:style-name="Text_20_body">Les característiques principals d'aquesta aplicació de l'ABP són:</text:p>
      <text:list xml:id="list3405887881" text:style-name="L3">
        <text:list-item>
          <text:p text:style-name="P18">Els comerços que apareixen a la web poden ser reals, cosa que incrementa la implicació de l'alumnat <text:span text:style-name="T3">o ficticis</text:span>.</text:p>
        </text:list-item>
        <text:list-item>
          <text:p text:style-name="P18">L'objectiu <text:span text:style-name="T3">final del projecte </text:span>és <text:span text:style-name="T3">el</text:span> lliurament <text:span text:style-name="T3">d’</text:span>una web operativa, cosa que eleva el nivell d'exigència i l'autoexigència de l'alumnat.</text:p>
        </text:list-item>
        <text:list-item>
          <text:p text:style-name="P18">Cada nou contingut tècnic <text:span text:style-name="T3">s</text:span>'incorpora al projecte en el moment en què és necessari per a avançar, evitant l'aprenentatge descontextualitzat.</text:p>
        </text:list-item>
        <text:list-item>
          <text:p text:style-name="P18"><text:span text:style-name="T3">L’alumnat treballa en </text:span>equips de <text:span text:style-name="T3">entre </text:span>3 <text:span text:style-name="T3">i </text:span>4 persones <text:span text:style-name="T3">màxim. S’</text:span>han de repartir tasques, negociar decisions tècniques i resoldre conflictes.</text:p>
        </text:list-item>
      </text:list>
      <text:h text:style-name="Heading_20_3" text:outline-level="3">Aprenentatge Basat en Serveis (ApS)</text:h>
      <text:p text:style-name="Text_20_body">L'A<text:span text:style-name="T20">B</text:span>S és una metodologia que combina l'aprenentatge curricular amb un servei real a la comunitat. <text:span text:style-name="T20">E</text:span>l producte que desenvolup<text:span text:style-name="T20">a</text:span> l'alumnat respon a una necessitat <text:span text:style-name="T20">real</text:span> i els seus destinataris són persones o col·lectius reals que es beneficien del resultat.</text:p>
      <text:p text:style-name="Text_20_body">En aquest projecte, la dimensió de servei es concreta en el fet que la web desenvolupada promou activament els comerços locals del municipi <text:span text:style-name="T20">elegit pel grup</text:span>, ajudant establiments reals a tindre presència digital i a ser accessibles per a la ciutadania.</text:p>
      <text:p text:style-name="P23">Això implica:</text:p>
      <text:list xml:id="list1780761673" text:style-name="L4">
        <text:list-item>
          <text:p text:style-name="P22"><text:span text:style-name="T16">Identificació d'una necessitat real. L'alumnat investiga quins comerços del seu entorn no tenen presència digital o la tenen limitada, </text:span><text:span text:style-name="T19">comprovant</text:span><text:span text:style-name="T16"> la utilitat del </text:span><text:span text:style-name="T19">producte</text:span><text:span text:style-name="T16"> que construirà.</text:span></text:p>
        </text:list-item>
      </text:list>
      <text:list xml:id="list3499484183" text:style-name="L5">
        <text:list-item>
          <text:p text:style-name="P19"><text:span text:style-name="T16">Contacte amb els destinataris. En la mesura que siga possible, es fomenta</text:span><text:span text:style-name="T19">rà</text:span><text:span text:style-name="T16"> que l'alumnat contacte amb els comerços per recollir la informació que apareixerà a la web, descripció, horaris, telèfon… incorporant així una experiència de comunicació professional real.</text:span></text:p>
        </text:list-item>
      </text:list>
      <text:list xml:id="list313104534" text:style-name="L6">
        <text:list-item>
          <text:p text:style-name="P20"><text:span text:style-name="T16">Producte amb impacte mesurable. El resultat final no és un lliurament intern per al docent, sinó una web funcional que pot ser consultada i utilitzada pe</text:span><text:span text:style-name="T19">r les veïnes i</text:span><text:span text:style-name="T16"> veïns del municipi.</text:span></text:p>
        </text:list-item>
      </text:list>
      <text:list xml:id="list2498442854" text:style-name="L7">
        <text:list-item>
          <text:p text:style-name="P21">Reflexió sobre el servei. Al llarg del projecte, i especialment en les retrospectives de cada Sprint, s'incorporen moments de reflexió sobre la dimensió social del treball: A qui ajuda el que estem construint? Què passaria si no existís aquesta web?</text:p>
        </text:list-item>
      </text:list>
      <text:p text:style-name="Text_20_body">Aquesta dimensió de l'A<text:span text:style-name="T21">B</text:span>S reforça la motivació intrínseca de l'alumnat, dota de significat les decisions tècniques i connecta el currículum del mòdul amb valors de responsabilitat, compromís i ciutadania digital activa.</text:p>
      <text:h text:style-name="Heading_20_3" text:outline-level="3">Metodologia <text:span text:style-name="T21">Agile</text:span> adaptada a l'aula</text:h>
      <text:p text:style-name="P4">Dins del marc <text:span text:style-name="T4">de l</text:span>'<text:span text:style-name="T2">aprenentatge basat en projectes </text:span><text:span text:style-name="T21">i de la metodologia Agile, utilitzarem la metodologia Scrum.</text:span> Aquesta metodologia estructura el projecte en Sprints de durada variable segons la <text:span text:style-name="T5">quantitat i</text:span> complexitat dels continguts de cada fase.</text:p>
      <text:h text:style-name="Heading_20_4" text:outline-level="4"><text:span text:style-name="T4">E</text:span>structura dels Sprints</text:h>
      <text:p text:style-name="P16">El projecte s'organitza en cinc Sprints. <text:span text:style-name="T21">La durada total del projecte serà de 132 hores lectives, distribuïdes en tres sessions dobles per setmana, impartides els dilluns, dimecres i divendres. </text:span>La <text:span text:style-name="T12">taula 1 mostra la planificació dels Springs </text:span><text:span text:style-name="T21">tenint en compte les 22 setmanes disponibles</text:span><text:span text:style-name="T12">. La </text:span>durada de cadascun s'ajusta al volum de continguts i a la dificultat tècnica implicada:</text:p>
      <table:table table:name="Tabla1" table:style-name="Tabla1" table:template-name="Elegant">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6">Sprint</text:p>
          </table:table-cell>
          <table:table-cell table:style-name="Tabla1.A1" office:value-type="string">
            <text:p text:style-name="P6">Nom</text:p>
          </table:table-cell>
          <table:table-cell table:style-name="Tabla1.A1" office:value-type="string">
            <text:p text:style-name="P17">Durada</text:p>
            <text:p text:style-name="P17"><text:span text:style-name="T21">Setmanes</text:span></text:p>
          </table:table-cell>
          <table:table-cell table:style-name="Tabla1.A1" office:value-type="string">
            <text:p text:style-name="P6">Continguts</text:p>
          </table:table-cell>
          <table:table-cell table:style-name="Tabla1.A1" office:value-type="string">
            <text:p text:style-name="P6">RA</text:p>
          </table:table-cell>
        </table:table-row>
        <table:table-row table:style-name="Tabla1.2">
          <table:table-cell table:style-name="Tabla1.A2" office:value-type="string">
            <text:p text:style-name="P7">1</text:p>
          </table:table-cell>
          <table:table-cell table:style-name="Tabla1.A2" office:value-type="string">
            <text:p text:style-name="P9">Planificació i disseny</text:p>
          </table:table-cell>
          <table:table-cell table:style-name="Tabla1.C2" office:value-type="float" office:value="2">
            <text:p text:style-name="P10">2</text:p>
          </table:table-cell>
          <table:table-cell table:style-name="Tabla1.A2" office:value-type="string">
            <text:p text:style-name="P8">Arquitectures web, wireframing, repartiment de rols</text:p>
          </table:table-cell>
          <table:table-cell table:style-name="Tabla1.A2" office:value-type="string">
            <text:p text:style-name="P9">RA1</text:p>
          </table:table-cell>
        </table:table-row>
        <table:table-row table:style-name="Tabla1.3">
          <table:table-cell table:style-name="Tabla1.A3" office:value-type="string">
            <text:p text:style-name="P7">2</text:p>
          </table:table-cell>
          <table:table-cell table:style-name="Tabla1.B3" office:value-type="string">
            <text:p text:style-name="P9">Estructura i maquetació</text:p>
          </table:table-cell>
          <table:table-cell table:style-name="Tabla1.C3" office:value-type="float" office:value="6">
            <text:p text:style-name="P10">6</text:p>
          </table:table-cell>
          <table:table-cell table:style-name="Tabla1.D3" office:value-type="string">
            <text:p text:style-name="P8">HTML semàntic, CSS, buscador estàtic</text:p>
          </table:table-cell>
          <table:table-cell table:style-name="Tabla1.E3" office:value-type="string">
            <text:p text:style-name="P9">RA2 RA6</text:p>
          </table:table-cell>
        </table:table-row>
        <table:table-row table:style-name="Tabla1.4">
          <table:table-cell table:style-name="Tabla1.A2" office:value-type="string">
            <text:p text:style-name="P7">3</text:p>
          </table:table-cell>
          <table:table-cell table:style-name="Tabla1.A2" office:value-type="string">
            <text:p text:style-name="P9">Lògica JavaScript</text:p>
          </table:table-cell>
          <table:table-cell table:style-name="Tabla1.C2" office:value-type="float" office:value="5">
            <text:p text:style-name="P11">5</text:p>
          </table:table-cell>
          <table:table-cell table:style-name="Tabla1.A2" office:value-type="string">
            <text:p text:style-name="P8">Variables, funcions, arrays, objectes, filtratge</text:p>
          </table:table-cell>
          <table:table-cell table:style-name="Tabla1.A2" office:value-type="string">
            <text:p text:style-name="P9">RA3 RA4</text:p>
          </table:table-cell>
        </table:table-row>
        <table:table-row table:style-name="Tabla1.5">
          <table:table-cell table:style-name="Tabla1.A3" office:value-type="string">
            <text:p text:style-name="P7">4</text:p>
          </table:table-cell>
          <table:table-cell table:style-name="Tabla1.B5" office:value-type="string">
            <text:p text:style-name="P9">Interactivitat i DOM</text:p>
          </table:table-cell>
          <table:table-cell table:style-name="Tabla1.C3" office:value-type="float" office:value="5">
            <text:p text:style-name="P11">5</text:p>
          </table:table-cell>
          <table:table-cell table:style-name="Tabla1.D3" office:value-type="string">
            <text:p text:style-name="P8">Esdeveniments, manipulació del DOM, fitxes dinàmiques</text:p>
          </table:table-cell>
          <table:table-cell table:style-name="Tabla1.E5" office:value-type="string">
            <text:p text:style-name="P9">RA5 RA6</text:p>
          </table:table-cell>
        </table:table-row>
        <table:table-row table:style-name="Tabla1.6">
          <table:table-cell table:style-name="Tabla1.A6" office:value-type="string">
            <text:p text:style-name="P7">5</text:p>
          </table:table-cell>
          <table:table-cell table:style-name="Tabla1.B6" office:value-type="string">
            <text:p text:style-name="P9">Comunicació asíncrona</text:p>
          </table:table-cell>
          <table:table-cell table:style-name="Tabla1.C6" office:value-type="float" office:value="3">
            <text:p text:style-name="P11">3</text:p>
          </table:table-cell>
          <table:table-cell table:style-name="Tabla1.D6" office:value-type="string">
            <text:p text:style-name="P8">Fetch API, JSON, actualització dinàmica</text:p>
          </table:table-cell>
          <table:table-cell table:style-name="Tabla1.E6" office:value-type="string">
            <text:p text:style-name="P9">RA7</text:p>
          </table:table-cell>
        </table:table-row>
      </table:table>
      <text:p text:style-name="P2">Ta<text:span text:style-name="T21">ul</text:span>a 1</text:p>
      <text:h text:style-name="Heading_20_4" text:outline-level="4"><text:soft-page-break/>Ritme de treball dins de cada Sprint</text:h>
      <text:p text:style-name="P3">Cada Sprint segueix una estructura que l'alumnat incorpora<text:span text:style-name="T6">rà</text:span> progressivament com a rutina de treball.</text:p>
      <text:p text:style-name="P3">El primer esdeveniment en Scrum és el Refinement o Grooming session, on l’equip es reuneix amb el Product Owner (PO) per a crear el seu backlog. L’equip junt amb el PO crea els PBI (product backlog items)</text:p>
      <text:p text:style-name="P3">Inici del Sprint — Sprint Planning</text:p>
      <text:p text:style-name="P5">L'equip revisa el Product Backlog, llista de funcionalitats pendents del projecte <text:span text:style-name="T21">ordenades per prioritats,</text:span> i selecciona les tasques que es compromet a completar, anotant-les al seu Sprint Backlog. Es defineixen els rols interns de l'equip per a <text:span text:style-name="T21">¿¿</text:span>aquest Sprint??, desenvolupador<text:span text:style-name="T6">a o desenvolupadora</text:span>, revisora <text:span text:style-name="T6">o revisor </text:span>de<text:span text:style-name="T6">l</text:span> codi, responsable de documentació…</text:p>
      <text:p text:style-name="P3">Durant el Sprint — Standup diari</text:p>
      <text:p text:style-name="P3">A l'inici de cada sessió, cada equip dedica entre 5 i 10 minuts a respondre tres preguntes: Què va<text:span text:style-name="T6">rem</text:span> fer l'última sessió? Què far<text:span text:style-name="T6">em</text:span> avui? T<text:span text:style-name="T6">e</text:span>n<text:span text:style-name="T6">im</text:span> algun bloqueig? Aquesta dinàmica fomenta la comunicació, detecta problemes i <text:span text:style-name="T6">treballa</text:span> la responsabilitat compartida.</text:p>
      <text:p text:style-name="P3">Final del Sprint — Sprint Review i Retrospectiva</text:p>
      <text:p text:style-name="P3">En acabar cada Sprint, els equips fa<text:span text:style-name="T21">ran</text:span> una breu demostració funcional del que han construït, seguida d’un breu debat guiat (guiat pel Scrum Master) on l'equip reflexiona col·lectivament sobre el que ha funcionat bé, el que caldria millorar i com s'organitzaran en el proper Sprint, d’aquesta reunió ixen solucions SMART per als problemes dectectats.</text:p>
      <text:h text:style-name="Heading_20_4" text:outline-level="4">Eines de gestió del projecte</text:h>
      <text:p text:style-name="P3">Per a fer <text:span text:style-name="T7">efectiva</text:span> la metodologia Scrum, cada equip gestionarà el seu treball mitjançant un tauler un Scrum board (per exemple amb Trello o GitHub Projects) amb les columnes Per fer, En progrés, Revisat <text:span text:style-name="T7">i</text:span> Fet. El <text:span text:style-name="T7">professor</text:span> tindrà accés als taulers per a fer el seguiment i detectar equips que necessiten suport.</text:p>
      <text:p text:style-name="P3"/>
      <text:h text:style-name="Heading_20_4" text:outline-level="4">Rol del docent</text:h>
      <text:p text:style-name="P3"><text:span text:style-name="T7">E</text:span>l docent <text:span text:style-name="T7">tindrà</text:span> principalment el rol de facilitador i Scrum Master. La seua funció no és transmetre els continguts de forma magistral, sinó orientar, desbloquejar dificultats, proposar reptes i garantir que el procés avança. Les explicacions teòriques es fan en format <text:span text:style-name="T7">de c</text:span><text:span text:style-name="T14">l</text:span><text:span text:style-name="T7">asse magistral breu, </text:span>màxim 15-20 minuts, just en el moment en què l'equip les necessita per a continuar el projecte, i sempre connectades directament amb la tasca en curs.</text:p>
      <text:p text:style-name="P3"/>
      <text:h text:style-name="P13" text:outline-level="2">Adaptacions i DUA</text:h>
      <text:h text:style-name="Heading_20_3" text:outline-level="3"><text:span text:style-name="T8">DUA. </text:span>Marc general</text:h>
      <text:p text:style-name="Text_20_body">El Disseny Universal per a l'Aprenentatge (DUA) és un enfocament que planteja dissenyar les activitats d'aprenentatge des del principi de manera que siguen accessibles per a tot l'alumnat, sense necessitat d'adaptacions posteriors individualitzades. Es basa en tres principis fonamentals:</text:p>
      <text:p text:style-name="Text_20_body">Múltiples formes de representació. <text:span text:style-name="T8">C</text:span>om es presenta la informació.</text:p>
      <text:p text:style-name="Text_20_body">Múltiples formes d'acció i expressió. <text:span text:style-name="T8">C</text:span>om demostra l'alumnat el que ha aprés.</text:p>
      <text:p text:style-name="Text_20_body">Múltiples formes d'implicació. <text:span text:style-name="T8">C</text:span>om es motiva i implica l'alumnat en el procés.</text:p>
      <text:p text:style-name="Text_20_body">En aquest projecte, el DUA s'aplica de forma transversal i vinculada a cada Sprint, de manera que les mesures <text:span text:style-name="T8">estiguen</text:span> integrad<text:span text:style-name="T8">es</text:span> en la dinàmica de treball.</text:p>
      <text:h text:style-name="Heading_20_3" text:outline-level="3">Perfil d'atenció a la diversitat: alumnat amb dificultats d'aprenentatge</text:h>
      <text:p text:style-name="Text_20_body">Les adaptacions recollides en aquest apartat estan orientades principalment a alumnat que pot presentar dislèxia, TDAH o altres dificultats específiques d'aprenentatge. En el context d'un cicle formatiu de grau superior, aquest alumnat sovint ha desenvolupat estratègies pròpies de compensació, però el treball amb codi, documentació tècnica i gestió del temps pot suposar una càrrega cognitiva.</text:p>
      <text:h text:style-name="Heading_20_3" text:outline-level="3">Adaptacions per Sprint</text:h>
      <text:h text:style-name="Heading_20_4" text:outline-level="4">Sprint <text:span text:style-name="T9">1. </text:span>Planificació i disseny</text:h>
      <text:p text:style-name="Text_20_body">La fase de planificació exigeix llegir i comprendre documents, prendre decisions abstractes i organitzar idees sense <text:span text:style-name="T9">disposar d’un </text:span>producte.</text:p>
      <text:p text:style-name="Text_20_body">Adaptacions:</text:p>
      <text:p text:style-name="Text_20_body">Proporcionar una plantilla estructurada del Sprint Backlog amb camps predefinits i exemples ja <text:span text:style-name="T9">emplenats</text:span>, per reduir la càrrega d'organització inicial.</text:p>
      <text:p text:style-name="Text_20_body">Permetre que el wireframe es faça en format físic (paper i llapis) com a alternativa al digital, si l'eina digital <text:span text:style-name="T9">les </text:span>genera <text:span text:style-name="T9">algun problema</text:span>.</text:p>
      <text:p text:style-name="Text_20_body">Assignar els rols d'equip de forma explícita en aquest primer Sprint, evitant que la negociació de rols sature l'alumnat abans de començar.</text:p>
      <text:p text:style-name="Text_20_body">Oferir la pregunta motriu del projecte en format oral i visual simultàniament (text + esquema + explicació del docent).</text:p>
      <text:p text:style-name="Text_20_body"/>
      <text:h text:style-name="P14" text:outline-level="4">Sprint <text:span text:style-name="T9">2. </text:span>Estructura i maquetació</text:h>
      <text:p text:style-name="Text_20_body">La lectura de documentació tècnica (MDN, apunts) pot ser lenta o esgotadora per a alumnat amb dislèxia. La gestió del temps en sessions llargues pot ser difícil per a alumnat amb TDAH.</text:p>
      <text:p text:style-name="Text_20_body">Adaptacions:</text:p>
      <text:p text:style-name="Text_20_body">Facilitar resums visuals de les etiquetes HTML i propietats CSS més <text:span text:style-name="T9">emprades</text:span> en el projecte (cheatsheets), per reduir la necessitat de llegir documentació extensa.</text:p>
      <text:p text:style-name="Text_20_body">Estructurar cada sessió en blocs de treball, amb pauses actives breus (tècnica Pomodoro), compatible amb la dinàmica Scrum.</text:p>
      <text:p text:style-name="Text_20_body">Proporcionar una plantilla HTML base comentada, que l'alumnat puga completar i modificar en lloc de partir de zero.</text:p>
      <text:p text:style-name="Text_20_body"><text:span text:style-name="T9">Emprar </text:span>extensions del navegador <text:span text:style-name="T9">per a millorar l’</text:span>accessibilitat, augment de font, mode alt contrast..</text:p>
      <text:h text:style-name="Heading_20_4" text:outline-level="4">Sprint <text:span text:style-name="T9">3</text:span>. Lògica JavaScript</text:h>
      <text:p text:style-name="Text_20_body">L'alumnat amb TDAH pot tenir dificultat per mantenir l'atenció en conceptes que no produeixen un resultat visual immediat. L'alumnat amb dislèxia pot cometre errors tipogràfics en el codi que generen frustració.</text:p>
      <text:p text:style-name="Text_20_body">Adaptacions:</text:p>
      <text:p text:style-name="Text_20_body">Introduir cada concepte nou amb un exemple mínim i funcional vinculat directament al projecte (per exemple, un array amb els noms dels comerços reals que estan construint).</text:p>
      <text:p text:style-name="Text_20_body">Fomentar l'ús d'eines de detecció d'errors en temps real (ESLint, Prettier integrats a l'editor) per reduir l'impacte dels errors tipogràfics.</text:p>
      <text:p text:style-name="Text_20_body">Oferir pseudocodi en valencià com a pas intermedi abans d'escriure codi real, per desacoblar la lògica de la sintaxi.</text:p>
      <text:p text:style-name="Text_20_body">Dividir les tasques del Sprint Backlog en subtasques per a aquest equip, de manera que cada sessió tinga objectiu<text:span text:style-name="T10">s</text:span> <text:span text:style-name="T10">més xicotets</text:span> i assolible<text:span text:style-name="T10">s</text:span>.</text:p>
      <text:h text:style-name="Heading_20_4" text:outline-level="4">Sprint <text:span text:style-name="T9">4. </text:span>Interactivitat i DOM</text:h>
      <text:p text:style-name="Text_20_body">La manipulació del DOM implica entendre la relació entre HTML i JavaScript de forma simultània, cosa que pot saturar la memòria de treball. Els esdeveniments poden ser difícils de depurar i generar cicles de frustració.</text:p>
      <text:p text:style-name="Text_20_body">Adaptacions:</text:p>
      <text:p text:style-name="Text_20_body"><text:span text:style-name="T10">Emprar</text:span> diagrames visuals de l'arbre DOM del projecte concret, de manera que l'alumnat puga consultar visualment on es troba cada element mentre <text:span text:style-name="T10">programa</text:span>.</text:p>
      <text:p text:style-name="Text_20_body">Proposar una llista de comprovació per als esdeveniments, <text:span text:style-name="T10">per a</text:span> alleujar la memòria de treball.</text:p>
      <text:p text:style-name="Text_20_body">Permetre que la Sprint Review d'aquest Sprint es faça en format demostració pràctica sense exposició oral obligatòria, acceptant també una gravació de pantalla com a alternativa.</text:p>
      <text:p text:style-name="Text_20_body"/>
      <text:h text:style-name="P14" text:outline-level="4">Sprint <text:span text:style-name="T9">5. </text:span>Comunicació asíncrona</text:h>
      <text:p text:style-name="Text_20_body">Els conceptes de peticions asíncrones (promeses, async/await) són dels més abstractes del mòdul i poden generar sensació d'encallament. La pressió del tancament del projecte pot augmentar l'ansietat.</text:p>
      <text:p text:style-name="Text_20_body">Adaptacions:</text:p>
      <text:p text:style-name="Text_20_body">Proporcionar un fragment de codi base de la crida fetch ja funcional que l'alumnat adapte al seu projecte, en lloc de construir-lo des de zero.</text:p>
      <text:p text:style-name="Text_20_body">Oferir un JSON d'exemple amb l'estructura ja definida perquè l'equip puga centrar-se en la integració i no en el disseny de dades.</text:p>
      <text:p text:style-name="Text_20_body">En la Sprint Review final, oferir la possibilitat de presentar en format de demostració guiada per un<text:span text:style-name="T11">a</text:span> companya <text:span text:style-name="T11">o company</text:span> de suport dins del mateix equip, distribuint la càrrega de l'exposició.</text:p>
      <text:p text:style-name="Text_20_body">Preveure una sessió de tancament i reflexió on l'alumnat puga expressar el que ha aprés en format lliure (escrit, oral, visual), reconeixent el progrés més enllà del resultat final.</text:p>
      <text:h text:style-name="Heading_20_4" text:outline-level="4">Mesures transversals a tots els Sprints</text:h>
      <text:p text:style-name="Text_20_body">Més enllà de les adaptacions específiques per Sprint, hi ha una sèrie de mesures que el docent aplicarà de forma continuada al llarg de tot el projecte:</text:p>
      <text:p text:style-name="Text_20_body">Instruccions en múltiples formats. <text:span text:style-name="T11">Q</text:span>ualsevol enunciat de tasca es proporciona sempre per escrit i s'explica també oralment, evitant que la comprensió lectora es convertisca en un filtre d'accés al contingut.</text:p>
      <text:p text:style-name="Text_20_body">Feedback freqüent. <text:span text:style-name="T11">E</text:span>l docent dedica un moment de seguiment individual o per equip en cada sessió, evitant que les dificultats s'acumulen fins a la revisió final.</text:p>
      <text:p text:style-name="Text_20_body">Avaluació del procés, no sols del producte: el tauler Kanban, els standups i les retrospectives són evidències d'aprenentatge tan vàlides com el codi entregat, cosa que permet reconèixer el progrés de tot l'alumnat independentment del ritme.</text:p>
      <text:p text:style-name="Text_20_body"><text:span text:style-name="T11">A</text:span>favorei<text:span text:style-name="T11">r</text:span> un clima on l'error és part del procés, especialment beneficiós per a alumnat que habitualment viu l'error amb alta càrrega emocio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rfc-language-tag="ca-ES-valencia" number:language="ca" number:country="ES">
      <number:number number:min-integer-digits="1"/>
    </number:number-style>
    <number:text-style style:name="N10100" number:rfc-language-tag="ca-ES-valencia" number:language="ca"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P1" style:family="paragraph" style:parent-style-name="Heading_20_1">
      <style:paragraph-properties fo:text-align="center" style:justify-single-word="false"/>
      <style:text-properties officeooo:paragraph-rsid="0023ff4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fo:background-color="transparent" style:dynamic-spacing="false" draw:fill="none" draw:fill-color="#729fcf"/>
      </style:header-style>
      <style:footer-style>
        <style:header-footer-properties fo:min-height="1.101cm" fo:margin-left="0cm" fo:margin-right="0cm" fo:margin-top="0.3cm" fo:border="none" fo:padding-top="0.199cm" fo:padding-bottom="0cm" fo:padding-left="0cm" fo:padding-right="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Estratègies Metodològiques</text:h>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ep Palmero</meta:initial-creator>
    <meta:creation-date>2026-04-25T15:56:36.474086226</meta:creation-date>
    <dc:date>2026-05-06T12:14:06.480153452</dc:date>
    <dc:creator>Josep Palmero</dc:creator>
    <meta:editing-duration>PT7H31M35S</meta:editing-duration>
    <meta:editing-cycles>6</meta:editing-cycles>
    <meta:generator>LibreOffice/7.3.7.2$Linux_X86_64 LibreOffice_project/30$Build-2</meta:generator>
    <meta:document-statistic meta:table-count="1" meta:image-count="0" meta:object-count="0" meta:page-count="6" meta:paragraph-count="122" meta:word-count="1991" meta:character-count="12944" meta:non-whitespace-character-count="11080"/>
  </office:meta>
</office:document-meta>
</file>