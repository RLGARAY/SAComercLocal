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000000100F29F55C8.png" manifest:media-type="image/png"/>
  <manifest:file-entry manifest:full-path="Pictures/10000001000001000000010091F167E3.png" manifest:media-type="image/png"/>
  <manifest:file-entry manifest:full-path="Pictures/100000010000012C0000012CA22BE12E.png" manifest:media-type="image/png"/>
  <manifest:file-entry manifest:full-path="Pictures/100000010000010000000100A7F3FFF9.png" manifest:media-type="image/png"/>
  <manifest:file-entry manifest:full-path="Pictures/1000000100000100000001006E73121B.png" manifest:media-type="image/png"/>
  <manifest:file-entry manifest:full-path="Pictures/1000000100000100000001008617126B.png" manifest:media-type="image/png"/>
  <manifest:file-entry manifest:full-path="Pictures/100000010000016300000135DB0FB641.png" manifest:media-type="image/png"/>
  <manifest:file-entry manifest:full-path="Pictures/1000000100000100000001008CD3D2F9.png" manifest:media-type="image/png"/>
  <manifest:file-entry manifest:full-path="Pictures/100000010000020F0000011EB919038D.png" manifest:media-type="image/png"/>
  <manifest:file-entry manifest:full-path="Pictures/100000010000010000000100906BAB19.png" manifest:media-type="image/png"/>
  <manifest:file-entry manifest:full-path="Pictures/100000010000010000000100556A67F0.png" manifest:media-type="image/png"/>
  <manifest:file-entry manifest:full-path="Pictures/100000010000008000000080D9A6890E.png" manifest:media-type="image/png"/>
  <manifest:file-entry manifest:full-path="Pictures/1000000100000100000001007FFB8988.png" manifest:media-type="image/png"/>
  <manifest:file-entry manifest:full-path="Pictures/100000010000010000000100F1885F1D.png" manifest:media-type="image/png"/>
  <manifest:file-entry manifest:full-path="Pictures/100000010000010000000100D17E53A9.png" manifest:media-type="image/png"/>
  <manifest:file-entry manifest:full-path="Pictures/10000001000001000000010042DBA461.png" manifest:media-type="image/png"/>
  <manifest:file-entry manifest:full-path="Pictures/10000001000001000000010039980ACF.png" manifest:media-type="image/png"/>
  <manifest:file-entry manifest:full-path="Pictures/10000001000001000000010003F58B1D.png" manifest:media-type="image/png"/>
  <manifest:file-entry manifest:full-path="Pictures/100000010000010000000100BA56FEDE.png" manifest:media-type="image/png"/>
  <manifest:file-entry manifest:full-path="Pictures/10000001000001000000010098643175.png" manifest:media-type="image/png"/>
  <manifest:file-entry manifest:full-path="Pictures/10000001000001000000010046AACCDD.png" manifest:media-type="image/png"/>
  <manifest:file-entry manifest:full-path="Pictures/10000001000001000000010092B9B518.png" manifest:media-type="image/png"/>
  <manifest:file-entry manifest:full-path="Pictures/10000001000001000000010047D0D916.png" manifest:media-type="image/png"/>
  <manifest:file-entry manifest:full-path="Pictures/1000000100000100000001000DC0678C.png" manifest:media-type="image/png"/>
  <manifest:file-entry manifest:full-path="Pictures/100000010000008000000080E50295C8.png" manifest:media-type="image/png"/>
  <manifest:file-entry manifest:full-path="Pictures/1000000100000080000000807A012047.png" manifest:media-type="image/png"/>
  <manifest:file-entry manifest:full-path="Pictures/100000010000010000000100228F73E6.png" manifest:media-type="image/png"/>
  <manifest:file-entry manifest:full-path="Pictures/1000000100000100000001005D53C44C.png" manifest:media-type="image/png"/>
  <manifest:file-entry manifest:full-path="Pictures/100000010000010000000100DED37C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3c5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18f01" draw:stroke-linejoin="round" draw:fill="solid" draw:fill-color="#f18f0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2e86ab" draw:stroke-linejoin="round" draw:fill="solid" draw:fill-color="#2e86a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0f2236" draw:stroke-linejoin="round" draw:fill="solid" draw:fill-color="#0f223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035cm" svg:stroke-color="#0d2b45" svg:stroke-opacity="70%" draw:stroke-linejoin="round" draw:fill="solid" draw:fill-color="#0d2b45" draw:opacity="7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35cm" svg:stroke-color="#2e86ab" svg:stroke-opacity="50%" draw:stroke-linejoin="round" draw:fill="solid" draw:fill-color="#2e86ab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style:protect="size" loext:decorative="false"/>
    </style:style>
    <style:style style:name="gr17" style:family="graphic" style:parent-style-name="standard">
      <style:graphic-properties draw:stroke="solid" svg:stroke-width="0.035cm" svg:stroke-color="#2e86ab" draw:stroke-linejoin="round" draw:fill="solid" draw:fill-color="#2e86ab" draw:textarea-vertical-align="top" draw:auto-grow-height="false" fo:min-height="2.543cm" fo:min-width="24.899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35cm" svg:stroke-color="#f18f01" draw:stroke-linejoin="round" draw:fill="solid" draw:fill-color="#f18f01" draw:textarea-vertical-align="top" draw:auto-grow-height="false" fo:min-height="0cm" fo:min-width="24.899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31cm" fo:min-width="23.367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e2e8f0" draw:stroke-linejoin="round" draw:fill="solid" draw:fill-color="#f1f5f9" draw:textarea-vertical-align="top" draw:auto-grow-height="false" fo:min-height="10.163cm" fo:min-width="11.183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21" style:family="graphic" style:parent-style-name="standard">
      <style:graphic-properties draw:stroke="solid" svg:stroke-width="0.035cm" svg:stroke-color="#f18f01" draw:stroke-linejoin="round" draw:fill="solid" draw:fill-color="#f18f01" draw:textarea-vertical-align="top" draw:auto-grow-height="false" fo:min-height="1.4cm" fo:min-width="11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23cm" fo:min-width="9.778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127cm" fo:min-width="10.921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2e86ab" draw:stroke-linejoin="round" draw:fill="solid" draw:fill-color="#2e86ab" draw:textarea-vertical-align="top" draw:auto-grow-height="false" fo:min-height="1.4cm" fo:min-width="11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23cm" fo:min-width="9.778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127cm" fo:min-width="10.921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solid" svg:stroke-width="0.035cm" svg:stroke-color="#1a3c5e" draw:stroke-linejoin="round" draw:fill="solid" draw:fill-color="#1a3c5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e2e8f0" draw:stroke-linejoin="round" draw:fill="solid" draw:fill-color="#f1f5f9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10b981" draw:stroke-linejoin="round" draw:fill="solid" draw:fill-color="#10b98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e2e8f0" draw:stroke-linejoin="round" draw:fill="solid" draw:fill-color="#f1f5f9" draw:textarea-vertical-align="top" draw:auto-grow-height="false" fo:min-height="7.369cm" fo:min-width="3.944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40" style:family="graphic" style:parent-style-name="standard">
      <style:graphic-properties draw:stroke="solid" svg:stroke-width="0.035cm" svg:stroke-color="#1a3c5e" draw:stroke-linejoin="round" draw:fill="solid" draw:fill-color="#1a3c5e" draw:textarea-vertical-align="top" draw:auto-grow-height="false" fo:min-height="1.146cm" fo:min-width="3.944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69cm" fo:min-width="4.063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9b59b6" draw:stroke-linejoin="round" draw:fill="solid" draw:fill-color="#9b59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>
      <style:graphic-properties draw:stroke="solid" svg:stroke-width="0.035cm" svg:stroke-color="#e74c3c" draw:stroke-linejoin="round" draw:fill="solid" draw:fill-color="#e74c3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e2e8f0" draw:stroke-linejoin="round" draw:fill="solid" draw:fill-color="#fafcff" draw:textarea-vertical-align="top" draw:auto-grow-height="false" fo:min-height="8.203cm" fo:min-width="6.738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1a3c5e" draw:stroke-linejoin="round" draw:fill="solid" draw:fill-color="#1a3c5e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f18f01" draw:stroke-linejoin="round" draw:fill="solid" draw:fill-color="#f18f01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>
      <style:graphic-properties draw:stroke="solid" svg:stroke-width="0.035cm" svg:stroke-color="#10b981" draw:stroke-linejoin="round" draw:fill="solid" draw:fill-color="#10b981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035cm" svg:stroke-color="#e2e8f0" draw:stroke-linejoin="round" draw:fill="solid" draw:fill-color="#f1f5f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8cm" fo:min-width="22.859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>
      <style:graphic-properties draw:stroke="solid" svg:stroke-width="0.035cm" svg:stroke-color="#e2e8f0" draw:stroke-linejoin="round" draw:fill="solid" draw:fill-color="#f1f5f9" draw:textarea-vertical-align="top" draw:auto-grow-height="false" fo:min-height="0.638cm" fo:min-width="22.001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none" draw:fill="none" fo:min-height="0.37cm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35cm" svg:stroke-color="#0d1117" draw:stroke-linejoin="round" draw:fill="solid" draw:fill-color="#0d111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>
      <style:graphic-properties draw:stroke="solid" svg:stroke-width="0.035cm" svg:stroke-color="#1e1e1e" draw:stroke-linejoin="round" draw:fill="solid" draw:fill-color="#1e1e1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>
      <style:graphic-properties draw:stroke="solid" svg:stroke-width="0.035cm" svg:stroke-color="#24292e" draw:stroke-linejoin="round" draw:fill="solid" draw:fill-color="#2429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>
      <style:graphic-properties draw:stroke="solid" svg:stroke-width="0.035cm" svg:stroke-color="#e8f0fe" draw:stroke-linejoin="round" draw:fill="solid" draw:fill-color="#e8f0f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fff0eb" draw:stroke-linejoin="round" draw:fill="solid" draw:fill-color="#fff0e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eaf7f0" draw:stroke-linejoin="round" draw:fill="solid" draw:fill-color="#eaf7f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>
      <style:graphic-properties draw:stroke="solid" svg:stroke-width="0.035cm" svg:stroke-color="#2e86ab" draw:stroke-linejoin="round" draw:fill="solid" draw:fill-color="#2e86ab" draw:textarea-vertical-align="top" draw:auto-grow-height="false" fo:min-height="2.251cm" fo:min-width="24.899cm" fo:padding-top="0.125cm" fo:padding-bottom="0.125cm" fo:padding-left="0.25cm" fo:padding-right="0.25cm" fo:wrap-option="wrap" loext:decorative="false"/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e2e8f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>
      <style:graphic-properties draw:stroke="solid" svg:stroke-width="0.035cm" svg:stroke-color="#f18f01" draw:stroke-linejoin="round" draw:fill="solid" draw:fill-color="#f18f01" draw:textarea-vertical-align="top" draw:auto-grow-height="false" fo:min-height="0.319cm" fo:min-width="24.899cm" fo:padding-top="0.125cm" fo:padding-bottom="0.125cm" fo:padding-left="0.25cm" fo:padding-right="0.25cm" fo:wrap-option="wrap" loext:decorative="false"/>
    </style:style>
    <style:style style:name="gr11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35cm" svg:stroke-color="#e2e8f0" draw:stroke-linejoin="round" draw:fill="solid" draw:fill-color="#f1f5f9" draw:textarea-vertical-align="top" draw:auto-grow-height="false" fo:min-height="0.968cm" fo:min-width="11.056cm" fo:padding-top="0.125cm" fo:padding-bottom="0.125cm" fo:padding-left="0.25cm" fo:padding-right="0.25cm" fo:wrap-option="wrap" loext:decorative="false"/>
    </style:style>
    <style:style style:name="gr1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4cm" fo:min-width="10.286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>
      <style:graphic-properties draw:stroke="solid" svg:stroke-width="0.035cm" svg:stroke-color="#d1d5db" draw:stroke-linejoin="round" draw:fill="solid" draw:fill-color="#d1d5d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>
      <style:graphic-properties draw:stroke="solid" svg:stroke-width="0.035cm" svg:stroke-color="#e2e8f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12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Blank_20_Slid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solid" draw:fill-color="#f18f01"/>
      <style:paragraph-properties fo:text-align="start"/>
      <style:text-properties fo:font-size="18pt"/>
    </style:style>
    <style:style style:name="P2" style:family="paragraph">
      <loext:graphic-properties draw:fill="solid" draw:fill-color="#2e86ab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solid" draw:fill-color="#0f2236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solid" draw:fill-color="#0d2b45" draw:opacity="70%"/>
      <style:paragraph-properties fo:text-align="start"/>
      <style:text-properties fo:font-size="18pt"/>
    </style:style>
    <style:style style:name="P9" style:family="paragraph">
      <loext:graphic-properties draw:fill="solid" draw:fill-color="#2e86ab" draw:opacity="50%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solid" draw:fill-color="#f1f5f9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212cm" fo:line-height="100%" fo:text-align="start" fo:text-indent="0cm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.212cm" fo:line-height="100%" fo:text-align="start" fo:text-indent="0cm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1a3c5e"/>
      <style:paragraph-properties fo:text-align="start"/>
      <style:text-properties fo:font-size="18pt"/>
    </style:style>
    <style:style style:name="P20" style:family="paragraph">
      <loext:graphic-properties draw:fill="solid" draw:fill-color="#10b981"/>
      <style:paragraph-properties fo:text-align="start"/>
      <style:text-properties fo:font-size="18pt"/>
    </style:style>
    <style:style style:name="P21" style:family="paragraph">
      <loext:graphic-properties draw:fill="solid" draw:fill-color="#9b59b6"/>
      <style:paragraph-properties fo:text-align="start"/>
      <style:text-properties fo:font-size="18pt"/>
    </style:style>
    <style:style style:name="P22" style:family="paragraph">
      <loext:graphic-properties draw:fill="solid" draw:fill-color="#e74c3c"/>
      <style:paragraph-properties fo:text-align="start"/>
      <style:text-properties fo:font-size="18pt"/>
    </style:style>
    <style:style style:name="P23" style:family="paragraph">
      <loext:graphic-properties draw:fill="solid" draw:fill-color="#fafcff"/>
      <style:paragraph-properties fo:text-align="start"/>
      <style:text-properties fo:font-size="18pt"/>
    </style:style>
    <style:style style:name="P24" style:family="paragraph">
      <loext:graphic-properties draw:fill="solid" draw:fill-color="#1a3c5e" draw:opacity="15%"/>
      <style:paragraph-properties fo:text-align="start"/>
      <style:text-properties fo:font-size="18pt"/>
    </style:style>
    <style:style style:name="P25" style:family="paragraph">
      <loext:graphic-properties draw:fill="solid" draw:fill-color="#f18f01" draw:opacity="15%"/>
      <style:paragraph-properties fo:text-align="start"/>
      <style:text-properties fo:font-size="18pt"/>
    </style:style>
    <style:style style:name="P26" style:family="paragraph">
      <loext:graphic-properties draw:fill="solid" draw:fill-color="#10b981" draw:opacity="15%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0d1117"/>
      <style:paragraph-properties fo:text-align="start"/>
      <style:text-properties fo:font-size="18pt"/>
    </style:style>
    <style:style style:name="P31" style:family="paragraph">
      <loext:graphic-properties draw:fill="solid" draw:fill-color="#1e1e1e"/>
      <style:paragraph-properties fo:text-align="start"/>
      <style:text-properties fo:font-size="18pt"/>
    </style:style>
    <style:style style:name="P32" style:family="paragraph">
      <loext:graphic-properties draw:fill="solid" draw:fill-color="#24292e"/>
      <style:paragraph-properties fo:text-align="start"/>
      <style:text-properties fo:font-size="18pt"/>
    </style:style>
    <style:style style:name="P33" style:family="paragraph">
      <loext:graphic-properties draw:fill="solid" draw:fill-color="#e8f0fe"/>
      <style:paragraph-properties fo:text-align="start"/>
      <style:text-properties fo:font-size="18pt"/>
    </style:style>
    <style:style style:name="P34" style:family="paragraph">
      <loext:graphic-properties draw:fill="solid" draw:fill-color="#fff0eb"/>
      <style:paragraph-properties fo:text-align="start"/>
      <style:text-properties fo:font-size="18pt"/>
    </style:style>
    <style:style style:name="P35" style:family="paragraph">
      <loext:graphic-properties draw:fill="solid" draw:fill-color="#eaf7f0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d1d5db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.353cm" fo:line-height="100%" fo:text-align="start" fo:text-indent="0cm"/>
    </style:style>
    <style:style style:name="P39" style:family="paragraph">
      <loext:graphic-properties draw:fill="none"/>
      <style:paragraph-properties fo:margin-left="0cm" fo:margin-right="0cm" fo:margin-top="0cm" fo:margin-bottom="0.353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13pt" fo:letter-spacing="normal" style:rfc-language-tag="ca-ES-valencia" fo:language="ca" fo:country="E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8pt" fo:letter-spacing="normal" style:rfc-language-tag="ca-ES-valencia" fo:language="ca" fo:country="ES" fo:font-style="normal" style:text-underline-style="none" fo:font-weight="bold" fo:background-color="transparent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3" style:family="text">
      <style:text-properties fo:font-variant="normal" fo:text-transform="none" fo:color="#a8d4f0" loext:opacity="100%" style:text-outline="false" style:text-line-through-style="none" style:text-line-through-type="none" style:text-position="0% 100%" style:font-name="Calibri" fo:font-size="22pt" fo:letter-spacing="normal" style:rfc-language-tag="ca-ES-valencia" fo:language="ca" fo:country="E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" style:family="text">
      <style:text-properties fo:font-variant="normal" fo:text-transform="none" fo:color="#7bafd4" loext:opacity="100%" style:text-outline="false" style:text-line-through-style="none" style:text-line-through-type="none" style:text-position="0% 100%" style:font-name="Calibri" fo:font-size="14pt" fo:letter-spacing="normal" style:rfc-language-tag="ca-ES-valencia" fo:language="ca" fo:country="ES" fo:font-style="italic" style:text-underline-style="none" fo:font-weight="normal" fo:background-color="transparent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style:rfc-language-tag="ca-ES-valencia" fo:language="ca" fo:country="ES" fo:font-style="normal" style:text-underline-style="none" fo:font-weight="bold" fo:background-color="transparent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style:rfc-language-tag="ca-ES-valencia" fo:language="ca" fo:country="E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style:rfc-language-tag="ca-ES-valencia" fo:language="ca" fo:country="E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style:rfc-language-tag="ca-ES-valencia" fo:language="ca" fo:country="E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12pt" fo:letter-spacing="normal" style:rfc-language-tag="ca-ES-valencia" fo:language="ca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0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4pt" fo:letter-spacing="normal" style:rfc-language-tag="ca-ES-valencia" fo:language="ca" fo:country="ES" fo:font-style="italic" style:text-underline-style="none" fo:font-weight="normal" fo:background-color="transparent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" style:family="text">
      <style:text-properties fo:font-variant="normal" fo:text-transform="none" fo:color="#1a3c5e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2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9.5pt" fo:letter-spacing="normal" style:rfc-language-tag="ca-ES-valencia" fo:language="ca" fo:country="ES" fo:font-style="normal" style:text-underline-style="none" fo:font-weight="normal" fo:background-color="transparent" style:font-name-asian="DejaVu Sans" style:font-size-asian="9.5pt" style:font-style-asian="normal" style:font-weight-asian="normal" style:font-name-complex="DejaVu Sans" style:font-size-complex="9.5pt" style:font-style-complex="normal" style:font-weight-complex="normal"/>
    </style:style>
    <style:style style:name="T13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12pt" fo:letter-spacing="normal" style:rfc-language-tag="ca-ES-valencia" fo:language="ca" fo:country="E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4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5" style:family="text">
      <style:text-properties fo:font-variant="normal" fo:text-transform="none" fo:color="#10b981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6" style:family="text">
      <style:text-properties fo:font-variant="normal" fo:text-transform="none" fo:color="#f18f01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7" style:family="text">
      <style:text-properties fo:font-variant="normal" fo:text-transform="none" fo:color="#9b59b6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8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0" style:family="text">
      <style:text-properties fo:font-variant="normal" fo:text-transform="none" fo:color="#1a3c5e" loext:opacity="100%" style:text-outline="false" style:text-line-through-style="none" style:text-line-through-type="none" style:text-position="0% 100%" style:font-name="Calibri" fo:font-size="16pt" fo:letter-spacing="normal" style:rfc-language-tag="ca-ES-valencia" fo:language="ca" fo:country="ES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1" style:family="text">
      <style:text-properties fo:font-variant="normal" fo:text-transform="none" fo:color="#1a3c5e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2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3" style:family="text">
      <style:text-properties fo:font-variant="normal" fo:text-transform="none" fo:color="#f18f01" loext:opacity="100%" style:text-outline="false" style:text-line-through-style="none" style:text-line-through-type="none" style:text-position="0% 100%" style:font-name="Calibri" fo:font-size="16pt" fo:letter-spacing="normal" style:rfc-language-tag="ca-ES-valencia" fo:language="ca" fo:country="ES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4" style:family="text">
      <style:text-properties fo:font-variant="normal" fo:text-transform="none" fo:color="#f18f01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5" style:family="text">
      <style:text-properties fo:font-variant="normal" fo:text-transform="none" fo:color="#10b981" loext:opacity="100%" style:text-outline="false" style:text-line-through-style="none" style:text-line-through-type="none" style:text-position="0% 100%" style:font-name="Calibri" fo:font-size="16pt" fo:letter-spacing="normal" style:rfc-language-tag="ca-ES-valencia" fo:language="ca" fo:country="ES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10b981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7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.5pt" fo:letter-spacing="normal" style:rfc-language-tag="ca-ES-valencia" fo:language="ca" fo:country="ES" fo:font-style="italic" style:text-underline-style="none" fo:font-weight="normal" fo:background-color="transparent" style:font-name-asian="DejaVu Sans" style:font-size-asian="10.5pt" style:font-style-asian="italic" style:font-weight-asian="normal" style:font-name-complex="DejaVu Sans" style:font-size-complex="10.5pt" style:font-style-complex="italic" style:font-weight-complex="normal"/>
    </style:style>
    <style:style style:name="T28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.5pt" fo:letter-spacing="normal" style:rfc-language-tag="ca-ES-valencia" fo:language="ca" fo:country="ES" fo:font-style="italic" style:text-underline-style="none" fo:font-weight="normal" fo:background-color="transparent" style:font-name-asian="DejaVu Sans" style:font-size-asian="10.5pt" style:font-style-asian="italic" style:font-weight-asian="normal" style:font-name-complex="DejaVu Sans" style:font-size-complex="10.5pt" style:font-style-complex="italic" style:font-weight-complex="normal"/>
    </style:style>
    <style:style style:name="T29" style:family="text">
      <style:text-properties fo:font-variant="normal" fo:text-transform="none" fo:color="#1a3c5e" loext:opacity="100%" style:text-outline="false" style:text-line-through-style="none" style:text-line-through-type="none" style:text-position="0% 100%" style:font-name="Calibri" fo:font-size="13pt" fo:letter-spacing="normal" style:rfc-language-tag="ca-ES-valencia" fo:language="ca" fo:country="E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0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" fo:font-size="10pt" fo:letter-spacing="normal" style:rfc-language-tag="ca-ES-valencia" fo:language="ca" fo:country="E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1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10.5pt" fo:letter-spacing="normal" style:rfc-language-tag="ca-ES-valencia" fo:language="ca" fo:country="ES" fo:font-style="normal" style:text-underline-style="none" fo:font-weight="normal" fo:background-color="transparent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32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style:rfc-language-tag="ca-ES-valencia" fo:language="ca" fo:country="E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4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35" style:family="text">
      <style:text-properties fo:font-variant="normal" fo:text-transform="none" fo:color="#9b59b6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36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style:rfc-language-tag="ca-ES-valencia" fo:language="ca" fo:country="E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8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11pt" fo:letter-spacing="normal" style:rfc-language-tag="ca-ES-valencia" fo:language="ca" fo:country="E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2pt" fo:letter-spacing="normal" style:rfc-language-tag="ca-ES-valencia" fo:language="ca" fo:country="ES" fo:font-style="normal" style:text-underline-style="none" fo:font-weight="bold" fo:background-color="transparent" style:font-name-asian="DejaVu Sans" style:font-size-asian="62pt" style:font-style-asian="normal" style:font-weight-asian="bold" style:font-name-complex="DejaVu Sans" style:font-size-complex="62pt" style:font-style-complex="normal" style:font-weight-complex="bold"/>
    </style:style>
    <style:style style:name="T40" style:family="text">
      <style:text-properties fo:font-variant="normal" fo:text-transform="none" fo:color="#a8d4f0" loext:opacity="100%" style:text-outline="false" style:text-line-through-style="none" style:text-line-through-type="none" style:text-position="0% 100%" style:font-name="Calibri" fo:font-size="18pt" fo:letter-spacing="normal" style:rfc-language-tag="ca-ES-valencia" fo:language="ca" fo:country="ES" fo:font-style="italic" style:text-underline-style="none" fo:font-weight="normal" fo:background-color="transparent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41" style:family="text">
      <style:text-properties fo:font-variant="normal" fo:text-transform="none" fo:color="#a8d4f0" loext:opacity="100%" style:text-outline="false" style:text-line-through-style="none" style:text-line-through-type="none" style:text-position="0% 100%" style:font-name="Calibri" fo:font-size="12pt" fo:letter-spacing="normal" style:rfc-language-tag="ca-ES-valencia" fo:language="ca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2" style:family="text">
      <style:text-properties fo:font-variant="normal" fo:text-transform="none" fo:color="#0f2236" loext:opacity="100%" style:text-outline="false" style:text-line-through-style="none" style:text-line-through-type="none" style:text-position="0% 100%" style:font-name="Calibri" fo:font-size="9pt" fo:letter-spacing="normal" style:rfc-language-tag="ca-ES-valencia" fo:language="ca" fo:country="ES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f22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8d4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baf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953cm"/>
        <style:text-properties fo:font-family="Symbol" style:font-charset="x-symbol" fo:color="#0f22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a3c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e86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18f0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9b59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e74c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Shape 0" draw:style-name="gr1" draw:text-style-name="P1" draw:layer="layout" svg:width="25.398cm" svg:height="0.20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887cm" svg:height="14.082cm" svg:x="0cm" svg:y="0.2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16cm" svg:height="2.03cm" svg:x="0.889cm" svg:y="1.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" draw:text-style-name="P4" draw:layer="layout" svg:width="15.492cm" svg:height="1.776cm" svg:x="1.143cm" svg:y="1.397cm">
          <text:p text:style-name="P3"><text:span text:style-name="T1">CFGS Desenvolupament d'Aplicacions We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" draw:text-style-name="P4" draw:layer="layout" svg:width="19.048cm" svg:height="3.3cm" svg:x="1.143cm" svg:y="3.683cm">
          <text:p text:style-name="P3"><text:span text:style-name="T2">SA Comerç Loc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" draw:text-style-name="P4" draw:layer="layout" svg:width="17.778cm" svg:height="1.395cm" svg:x="1.143cm" svg:y="6.985cm">
          <text:p text:style-name="P3"><text:span text:style-name="T3">Projecte de Desenvolupament We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" draw:text-style-name="P4" draw:layer="layout" svg:width="17.778cm" svg:height="1.141cm" svg:x="1.143cm" svg:y="8.382cm">
          <text:p text:style-name="P3"><text:span text:style-name="T4">Mòdul 0612 — Desenvolupament Web en Entorn Cli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" draw:text-style-name="P5" draw:layer="layout" svg:width="23.62cm" svg:height="2.284cm" svg:x="0.889cm" svg:y="11.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" draw:text-style-name="P2" draw:layer="layout" svg:width="4.062cm" svg:height="1.268cm" svg:x="1.27cm" svg:y="11.811cm">
          <text:p/>
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8" draw:text-style-name="P7" draw:layer="layout" svg:width="4.062cm" svg:height="1.166cm" svg:x="1.27cm" svg:y="11.862cm">
          <text:p text:style-name="P6"><text:span text:style-name="T5">Rea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" draw:text-style-name="P2" draw:layer="layout" svg:width="4.062cm" svg:height="1.268cm" svg:x="5.893cm" svg:y="11.811cm">
          <text:p/>
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1" draw:style-name="gr9" draw:text-style-name="P7" draw:layer="layout" svg:width="4.062cm" svg:height="1.166cm" svg:x="5.893cm" svg:y="11.862cm">
          <text:p text:style-name="P6"><text:span text:style-name="T5">JavaScript ES6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" draw:text-style-name="P2" draw:layer="layout" svg:width="4.062cm" svg:height="1.268cm" svg:x="10.516cm" svg:y="11.811cm">
          <text:p/>
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3" draw:style-name="gr10" draw:text-style-name="P7" draw:layer="layout" svg:width="4.062cm" svg:height="1.166cm" svg:x="10.516cm" svg:y="11.862cm">
          <text:p text:style-name="P6"><text:span text:style-name="T5">Git / Git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" draw:text-style-name="P2" draw:layer="layout" svg:width="4.062cm" svg:height="1.268cm" svg:x="15.138cm" svg:y="11.811cm">
          <text:p/>
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5" draw:style-name="gr11" draw:text-style-name="P7" draw:layer="layout" svg:width="4.062cm" svg:height="1.166cm" svg:x="15.138cm" svg:y="11.862cm">
          <text:p text:style-name="P6"><text:span text:style-name="T5">REST AP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" draw:text-style-name="P2" draw:layer="layout" svg:width="4.062cm" svg:height="1.268cm" svg:x="19.761cm" svg:y="11.811cm">
          <text:p/>
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7" draw:style-name="gr12" draw:text-style-name="P7" draw:layer="layout" svg:width="4.062cm" svg:height="1.166cm" svg:x="19.761cm" svg:y="11.862cm">
          <text:p text:style-name="P6"><text:span text:style-name="T5">Scr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8" draw:layer="layout" svg:width="6.348cm" svg:height="6.348cm" svg:x="18.412cm" svg:y="2.5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" draw:style-name="gr14" draw:text-style-name="P9" draw:layer="layout" svg:width="4.316cm" svg:height="4.316cm" svg:x="19.428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5" draw:text-style-name="P10" draw:layer="layout" svg:width="3.554cm" svg:height="3.554cm" svg:x="19.809cm" svg:y="3.937cm">
          <draw:image xlink:href="Pictures/100000010000012C0000012CA22BE12E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PlaceHolder 1" draw:style-name="gr16" draw:layer="layout" svg:width="15.238cm" svg:height="8.571cm" svg:x="1.905cm" svg:y="3.175cm" draw:page-number="1" presentation:class="page"/>
          <draw:frame draw:name="PlaceHolder 2" presentation:style-name="pr1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2" draw:style-name="dp3" draw:master-page-name="Blank_20_Slide">
        <draw:custom-shape draw:name="Shape 0" draw:style-name="gr17" draw:text-style-name="P2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8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9" draw:text-style-name="P4" draw:layer="layout" svg:width="23.366cm" svg:height="2.03cm" svg:x="1.016cm" svg:y="0.381cm">
          <text:p text:style-name="P14"><text:span text:style-name="T7">Per què paga la pena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0" draw:text-style-name="P15" draw:layer="layout" svg:width="11.682cm" svg:height="10.412cm" svg:x="0.762cm" svg:y="3.8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" draw:layer="layout" svg:width="11.682cm" svg:height="1.649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5" draw:text-style-name="P10" draw:layer="layout" svg:width="1.268cm" svg:height="1.268cm" svg:x="1.016cm" svg:y="3.175cm">
          <draw:image xlink:href="Pictures/100000010000010000000100A7F3FFF9.png" xlink:type="simple" xlink:show="embed" xlink:actuate="onLoad" draw:mime-type="image/png">
            <text:p/>
          </draw:image>
          <svg:desc>preencoded.png</svg:desc>
        </draw:frame>
        <draw:custom-shape draw:name="Text 5" draw:style-name="gr22" draw:text-style-name="P4" draw:layer="layout" svg:width="9.777cm" svg:height="1.522cm" svg:x="2.413cm" svg:y="3.124cm">
          <text:p text:style-name="P14"><text:span text:style-name="T8">Impacte real al teu munici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" draw:text-style-name="P17" draw:layer="layout" svg:width="10.92cm" svg:height="8.126cm" svg:x="1cm" svg:y="7.874cm">
          <text:list text:style-name="L7">
            <text:list-item>
              <text:p text:style-name="P16"><text:span text:style-name="T9">Molts xicotets negocis no tenen presència digital</text:span></text:p>
            </text:list-item>
            <text:list-item>
              <text:p text:style-name="P16"><text:span text:style-name="T9">La web ajuda la gent a descobrir i visitar els comerços locals</text:span></text:p>
            </text:list-item>
            <text:list-item>
              <text:p text:style-name="P16"><text:span text:style-name="T9">El vostre treball pot tenir un impacte tangible a la comunitat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0" draw:text-style-name="P15" draw:layer="layout" svg:width="11.682cm" svg:height="10.412cm" svg:x="13.024cm" svg:y="3.0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4" draw:text-style-name="P2" draw:layer="layout" svg:width="11.682cm" svg:height="1.649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5" draw:text-style-name="P10" draw:layer="layout" svg:width="1.268cm" svg:height="1.268cm" svg:x="13.462cm" svg:y="3.175cm">
          <draw:image xlink:href="Pictures/1000000100000100000001008617126B.png" xlink:type="simple" xlink:show="embed" xlink:actuate="onLoad" draw:mime-type="image/png">
            <text:p/>
          </draw:image>
          <svg:desc>preencoded.png</svg:desc>
        </draw:frame>
        <draw:custom-shape draw:name="Text 9" draw:style-name="gr25" draw:text-style-name="P4" draw:layer="layout" svg:width="9.777cm" svg:height="1.522cm" svg:x="14.859cm" svg:y="3.124cm">
          <text:p text:style-name="P14"><text:span text:style-name="T8">Treballareu com al sector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6" draw:text-style-name="P17" draw:layer="layout" svg:width="10.92cm" svg:height="8.126cm" svg:x="13.589cm" svg:y="7.5cm">
          <text:list text:style-name="L7">
            <text:list-item>
              <text:p text:style-name="P16"><text:span text:style-name="T9">Treball en equip amb metodologia àgil (Scrum)</text:span></text:p>
            </text:list-item>
            <text:list-item>
              <text:p text:style-name="P16"><text:span text:style-name="T9">Gestió de tasques amb tauler Kanban (Trello)</text:span></text:p>
            </text:list-item>
            <text:list-item>
              <text:p text:style-name="P16"><text:span text:style-name="T9">Col·laboració amb Git i GitHub com els professionals</text:span></text:p>
            </text:list-item>
            <text:list-item>
              <text:p text:style-name="P16"><text:span text:style-name="T9">React, el framework JS més demanat al mercat laboral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8" draw:layer="layout" svg:width="4.882cm" svg:height="4.249cm" svg:x="3.618cm" svg:y="5.251cm">
          <draw:image xlink:href="Pictures/100000010000016300000135DB0FB641.png" xlink:type="simple" xlink:show="embed" xlink:actuate="onLoad" draw:mime-type="image/png">
            <text:p/>
          </draw:image>
        </draw:frame>
        <draw:frame draw:style-name="gr27" draw:text-style-name="P18" draw:layer="layout" svg:width="7.27cm" svg:height="3.945cm" svg:x="15.23cm" svg:y="5.5cm">
          <draw:image xlink:href="Pictures/100000010000020F0000011EB919038D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16" draw:layer="layout" svg:width="15.238cm" svg:height="8.571cm" svg:x="1.905cm" svg:y="3.175cm" draw:page-number="2" presentation:class="page"/>
          <draw:frame draw:name="PlaceHolder 2" presentation:style-name="pr3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3" draw:style-name="dp3" draw:master-page-name="Blank_20_Slide">
        <draw:custom-shape draw:name="Shape 0" draw:style-name="gr28" draw:text-style-name="P19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" draw:text-style-name="P4" draw:layer="layout" svg:width="23.366cm" svg:height="2.03cm" svg:x="1.016cm" svg:y="0.381cm">
          <text:p text:style-name="P3"><text:span text:style-name="T7">En què consisteix el project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4" draw:layer="layout" svg:width="23.366cm" svg:height="1.522cm" svg:x="1.016cm" svg:y="3.048cm">
          <text:p text:style-name="P3"><text:span text:style-name="T10">Construireu una plataforma digital per apropar els comerços locals de la vostra localitat a la ciutadani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1" draw:text-style-name="P15" draw:layer="layout" svg:width="4.443cm" svg:height="7.618cm" svg:x="0.762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4.443cm" svg:height="1.395cm" svg:x="0.762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5" draw:text-style-name="P10" draw:layer="layout" svg:width="1.395cm" svg:height="1.09cm" svg:x="2.286cm" svg:y="4.978cm">
          <draw:image xlink:href="Pictures/1000000100000100000001006E73121B.png" xlink:type="simple" xlink:show="embed" xlink:actuate="onLoad" draw:mime-type="image/png">
            <text:p/>
          </draw:image>
          <svg:desc>preencoded.png</svg:desc>
        </draw:frame>
        <draw:custom-shape draw:name="Text 6" draw:style-name="gr32" draw:text-style-name="P7" draw:layer="layout" svg:width="4.062cm" svg:height="1.268cm" svg:x="0.965cm" svg:y="6.401cm">
          <text:p text:style-name="P6"><text:span text:style-name="T11">Cercar i filtr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" draw:text-style-name="P7" draw:layer="layout" svg:width="4.062cm" svg:height="1.776cm" svg:x="0.965cm" svg:y="7.747cm">
          <text:p text:style-name="P6"><text:span text:style-name="T12">Per categories i tipus de comerç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1" draw:text-style-name="P15" draw:layer="layout" svg:width="4.443cm" svg:height="7.618cm" svg:x="5.588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4.443cm" svg:height="1.395cm" svg:x="5.588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5" draw:text-style-name="P10" draw:layer="layout" svg:width="1.395cm" svg:height="1.09cm" svg:x="7.112cm" svg:y="4.978cm">
          <draw:image xlink:href="Pictures/100000010000010000000100A7F3FFF9.png" xlink:type="simple" xlink:show="embed" xlink:actuate="onLoad" draw:mime-type="image/png">
            <text:p/>
          </draw:image>
          <svg:desc>preencoded.png</svg:desc>
        </draw:frame>
        <draw:custom-shape draw:name="Text 10" draw:style-name="gr34" draw:text-style-name="P7" draw:layer="layout" svg:width="4.062cm" svg:height="1.268cm" svg:x="5.791cm" svg:y="6.401cm">
          <text:p text:style-name="P6"><text:span text:style-name="T11">Catàleg de comerç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5" draw:text-style-name="P7" draw:layer="layout" svg:width="4.062cm" svg:height="1.776cm" svg:x="5.791cm" svg:y="7.747cm">
          <text:p text:style-name="P6"><text:span text:style-name="T12">Fitxes detallades de cada loc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1" draw:text-style-name="P15" draw:layer="layout" svg:width="4.443cm" svg:height="7.618cm" svg:x="10.414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6" draw:text-style-name="P20" draw:layer="layout" svg:width="4.443cm" svg:height="1.395cm" svg:x="10.414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5" draw:text-style-name="P10" draw:layer="layout" svg:width="1.395cm" svg:height="1.09cm" svg:x="11.938cm" svg:y="4.978cm">
          <draw:image xlink:href="Pictures/10000001000001000000010091F167E3.png" xlink:type="simple" xlink:show="embed" xlink:actuate="onLoad" draw:mime-type="image/png">
            <text:p/>
          </draw:image>
          <svg:desc>preencoded.png</svg:desc>
        </draw:frame>
        <draw:custom-shape draw:name="Text 14" draw:style-name="gr37" draw:text-style-name="P7" draw:layer="layout" svg:width="4.062cm" svg:height="1.268cm" svg:x="10.617cm" svg:y="6.401cm">
          <text:p text:style-name="P6"><text:span text:style-name="T11">Formulari contac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8" draw:text-style-name="P7" draw:layer="layout" svg:width="4.062cm" svg:height="1.776cm" svg:x="10.617cm" svg:y="7.747cm">
          <text:p text:style-name="P6"><text:span text:style-name="T12">Comunicació directa amb els comerç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9" draw:text-style-name="P15" draw:layer="layout" svg:width="4.443cm" svg:height="7.618cm" svg:x="15.24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0" draw:text-style-name="P19" draw:layer="layout" svg:width="4.443cm" svg:height="1.395cm" svg:x="15.24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5" draw:text-style-name="P10" draw:layer="layout" svg:width="1.395cm" svg:height="1.09cm" svg:x="16.764cm" svg:y="4.978cm">
          <draw:image xlink:href="Pictures/1000000100000100000001008CD3D2F9.png" xlink:type="simple" xlink:show="embed" xlink:actuate="onLoad" draw:mime-type="image/png">
            <text:p/>
          </draw:image>
          <svg:desc>preencoded.png</svg:desc>
        </draw:frame>
        <draw:custom-shape draw:name="Text 18" draw:style-name="gr41" draw:text-style-name="P7" draw:layer="layout" svg:width="4.062cm" svg:height="1.268cm" svg:x="15.443cm" svg:y="6.401cm">
          <text:p text:style-name="P6"><text:span text:style-name="T11">Mapa interacti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42" draw:text-style-name="P7" draw:layer="layout" svg:width="4.062cm" svg:height="1.776cm" svg:x="15.443cm" svg:y="7.747cm">
          <text:p text:style-name="P6"><text:span text:style-name="T12">Visualització geogràfica dels loc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1" draw:text-style-name="P15" draw:layer="layout" svg:width="4.443cm" svg:height="7.618cm" svg:x="20.066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43" draw:text-style-name="P21" draw:layer="layout" svg:width="4.443cm" svg:height="1.395cm" svg:x="20.066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5" draw:text-style-name="P10" draw:layer="layout" svg:width="1.395cm" svg:height="1.09cm" svg:x="21.59cm" svg:y="4.978cm">
          <draw:image xlink:href="Pictures/100000010000010000000100906BAB19.png" xlink:type="simple" xlink:show="embed" xlink:actuate="onLoad" draw:mime-type="image/png">
            <text:p/>
          </draw:image>
          <svg:desc>preencoded.png</svg:desc>
        </draw:frame>
        <draw:custom-shape draw:name="Text 22" draw:style-name="gr44" draw:text-style-name="P7" draw:layer="layout" svg:width="4.062cm" svg:height="1.268cm" svg:x="20.269cm" svg:y="6.401cm">
          <text:p text:style-name="P6"><text:span text:style-name="T11">Web respons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5" draw:text-style-name="P7" draw:layer="layout" svg:width="4.062cm" svg:height="1.776cm" svg:x="20.269cm" svg:y="7.747cm">
          <text:p text:style-name="P6"><text:span text:style-name="T12">Accessible des de qualsevol dispositi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" draw:text-style-name="P1" draw:layer="layout" svg:width="23.874cm" svg:height="1.065cm" svg:x="0.762cm" svg:y="12.8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6" draw:text-style-name="P7" draw:layer="layout" svg:width="23.874cm" svg:height="1.065cm" svg:x="0.762cm" svg:y="12.827cm">
          <text:p text:style-name="P6"><text:span text:style-name="T13">Impacte real. Molts xicotets negocis no tenen presència digital. La vostra web pot canviar-ho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3" presentation:class="page"/>
          <draw:frame draw:name="PlaceHolder 2" presentation:style-name="pr4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4" draw:style-name="dp3" draw:master-page-name="Blank_20_Slide">
        <draw:custom-shape draw:name="Shape 0" draw:style-name="gr28" draw:text-style-name="P19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6" draw:text-style-name="P20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" draw:text-style-name="P4" draw:layer="layout" svg:width="23.366cm" svg:height="2.03cm" svg:x="1.016cm" svg:y="0.381cm">
          <text:p text:style-name="P3"><text:span text:style-name="T7">Com treballarem? Metodologia àgi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1" draw:text-style-name="P15" draw:layer="layout" svg:width="4.367cm" svg:height="9.904cm" svg:x="0.508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" draw:text-style-name="P2" draw:layer="layout" svg:width="4.367cm" svg:height="0.201cm" svg:x="0.508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1.928cm" svg:height="1.928cm" svg:x="1.727cm" svg:y="3.6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5" draw:text-style-name="P10" draw:layer="layout" svg:width="1.573cm" svg:height="1.573cm" svg:x="1.905cm" svg:y="3.785cm">
          <draw:image xlink:href="Pictures/100000010000010000000100556A67F0.png" xlink:type="simple" xlink:show="embed" xlink:actuate="onLoad" draw:mime-type="image/png">
            <text:p/>
          </draw:image>
          <svg:desc>preencoded.png</svg:desc>
        </draw:frame>
        <draw:custom-shape draw:name="Text 6" draw:style-name="gr48" draw:text-style-name="P7" draw:layer="layout" svg:width="4.062cm" svg:height="1.649cm" svg:x="0.66cm" svg:y="5.791cm">
          <text:p text:style-name="P6"><text:span text:style-name="T14">Sprint</text:span></text:p>
          <text:p text:style-name="P6"><text:span text:style-name="T14">Plann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9" draw:text-style-name="P7" draw:layer="layout" svg:width="4.062cm" svg:height="4.824cm" svg:x="0.66cm" svg:y="7.62cm">
          <text:p text:style-name="P6"><text:span text:style-name="T12">L'equip distribueix les tasques i assumeix ro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5" draw:text-style-name="P10" draw:layer="layout" svg:width="0.531cm" svg:height="0.531cm" svg:x="4.877cm" svg:y="6.35cm">
          <draw:image xlink:href="Pictures/100000010000008000000080D9A6890E.png" xlink:type="simple" xlink:show="embed" xlink:actuate="onLoad" draw:mime-type="image/png">
            <text:p/>
          </draw:image>
          <svg:desc>preencoded.png</svg:desc>
        </draw:frame>
        <draw:custom-shape draw:name="Shape 8" draw:style-name="gr31" draw:text-style-name="P15" draw:layer="layout" svg:width="4.367cm" svg:height="9.904cm" svg:x="5.41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6" draw:text-style-name="P20" draw:layer="layout" svg:width="4.367cm" svg:height="0.201cm" svg:x="5.41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6" draw:text-style-name="P20" draw:layer="layout" svg:width="1.928cm" svg:height="1.928cm" svg:x="6.629cm" svg:y="3.6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5" draw:text-style-name="P10" draw:layer="layout" svg:width="1.573cm" svg:height="1.573cm" svg:x="6.807cm" svg:y="3.785cm">
          <draw:image xlink:href="Pictures/10000001000001000000010091F167E3.png" xlink:type="simple" xlink:show="embed" xlink:actuate="onLoad" draw:mime-type="image/png">
            <text:p/>
          </draw:image>
          <svg:desc>preencoded.png</svg:desc>
        </draw:frame>
        <draw:custom-shape draw:name="Text 11" draw:style-name="gr50" draw:text-style-name="P7" draw:layer="layout" svg:width="4.062cm" svg:height="1.649cm" svg:x="5.563cm" svg:y="5.791cm">
          <text:p text:style-name="P6"><text:span text:style-name="T15">Standup</text:span></text:p>
          <text:p text:style-name="P6"><text:span text:style-name="T15">Diar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1" draw:text-style-name="P7" draw:layer="layout" svg:width="4.062cm" svg:height="4.824cm" svg:x="5.563cm" svg:y="7.62cm">
          <text:p text:style-name="P6"><text:span text:style-name="T12">5-10 min: què vaig fer? Què faré? Bloqueig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5" draw:text-style-name="P10" draw:layer="layout" svg:width="0.531cm" svg:height="0.531cm" svg:x="9.779cm" svg:y="6.35cm">
          <draw:image xlink:href="Pictures/100000010000008000000080D9A6890E.png" xlink:type="simple" xlink:show="embed" xlink:actuate="onLoad" draw:mime-type="image/png">
            <text:p/>
          </draw:image>
          <svg:desc>preencoded.png</svg:desc>
        </draw:frame>
        <draw:custom-shape draw:name="Shape 13" draw:style-name="gr31" draw:text-style-name="P15" draw:layer="layout" svg:width="4.367cm" svg:height="9.904cm" svg:x="10.312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4.367cm" svg:height="0.201cm" svg:x="10.312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928cm" svg:height="1.928cm" svg:x="11.532cm" svg:y="3.6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4" draw:style-name="gr15" draw:text-style-name="P10" draw:layer="layout" svg:width="1.573cm" svg:height="1.573cm" svg:x="11.709cm" svg:y="3.785cm">
          <draw:image xlink:href="Pictures/1000000100000100000001007FFB8988.png" xlink:type="simple" xlink:show="embed" xlink:actuate="onLoad" draw:mime-type="image/png">
            <text:p/>
          </draw:image>
          <svg:desc>preencoded.png</svg:desc>
        </draw:frame>
        <draw:custom-shape draw:name="Text 16" draw:style-name="gr52" draw:text-style-name="P7" draw:layer="layout" svg:width="4.062cm" svg:height="1.649cm" svg:x="10.465cm" svg:y="5.791cm">
          <text:p text:style-name="P6"><text:span text:style-name="T16">Desenvolupament</text:span></text:p>
          <text:p text:style-name="P6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3" draw:text-style-name="P7" draw:layer="layout" svg:width="4.062cm" svg:height="4.824cm" svg:x="10.465cm" svg:y="7.62cm">
          <text:p text:style-name="P6"><text:span text:style-name="T12">Programació, col·laboració i resolució de problem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5" draw:text-style-name="P10" draw:layer="layout" svg:width="0.531cm" svg:height="0.531cm" svg:x="14.681cm" svg:y="6.35cm">
          <draw:image xlink:href="Pictures/100000010000008000000080D9A6890E.png" xlink:type="simple" xlink:show="embed" xlink:actuate="onLoad" draw:mime-type="image/png">
            <text:p/>
          </draw:image>
          <svg:desc>preencoded.png</svg:desc>
        </draw:frame>
        <draw:custom-shape draw:name="Shape 18" draw:style-name="gr31" draw:text-style-name="P15" draw:layer="layout" svg:width="4.367cm" svg:height="9.904cm" svg:x="15.215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3" draw:text-style-name="P21" draw:layer="layout" svg:width="4.367cm" svg:height="0.201cm" svg:x="15.215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3" draw:text-style-name="P21" draw:layer="layout" svg:width="1.928cm" svg:height="1.928cm" svg:x="16.434cm" svg:y="3.6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6" draw:style-name="gr15" draw:text-style-name="P10" draw:layer="layout" svg:width="1.573cm" svg:height="1.573cm" svg:x="16.612cm" svg:y="3.785cm">
          <draw:image xlink:href="Pictures/100000010000010000000100F1885F1D.png" xlink:type="simple" xlink:show="embed" xlink:actuate="onLoad" draw:mime-type="image/png">
            <text:p/>
          </draw:image>
          <svg:desc>preencoded.png</svg:desc>
        </draw:frame>
        <draw:custom-shape draw:name="Text 21" draw:style-name="gr54" draw:text-style-name="P7" draw:layer="layout" svg:width="4.062cm" svg:height="1.649cm" svg:x="15.367cm" svg:y="5.791cm">
          <text:p text:style-name="P6"><text:span text:style-name="T17">Sprint</text:span></text:p>
          <text:p text:style-name="P6"><text:span text:style-name="T17">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5" draw:text-style-name="P7" draw:layer="layout" svg:width="4.062cm" svg:height="4.824cm" svg:x="15.367cm" svg:y="7.62cm">
          <text:p text:style-name="P6"><text:span text:style-name="T12">Demo del producte i feedback del professor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5" draw:text-style-name="P10" draw:layer="layout" svg:width="0.531cm" svg:height="0.531cm" svg:x="19.583cm" svg:y="6.35cm">
          <draw:image xlink:href="Pictures/100000010000008000000080D9A6890E.png" xlink:type="simple" xlink:show="embed" xlink:actuate="onLoad" draw:mime-type="image/png">
            <text:p/>
          </draw:image>
          <svg:desc>preencoded.png</svg:desc>
        </draw:frame>
        <draw:custom-shape draw:name="Shape 23" draw:style-name="gr31" draw:text-style-name="P15" draw:layer="layout" svg:width="4.367cm" svg:height="9.904cm" svg:x="20.117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6" draw:text-style-name="P22" draw:layer="layout" svg:width="4.367cm" svg:height="0.201cm" svg:x="20.117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6" draw:text-style-name="P22" draw:layer="layout" svg:width="1.928cm" svg:height="1.928cm" svg:x="21.336cm" svg:y="3.6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8" draw:style-name="gr15" draw:text-style-name="P10" draw:layer="layout" svg:width="1.573cm" svg:height="1.573cm" svg:x="21.514cm" svg:y="3.785cm">
          <draw:image xlink:href="Pictures/100000010000010000000100D17E53A9.png" xlink:type="simple" xlink:show="embed" xlink:actuate="onLoad" draw:mime-type="image/png">
            <text:p/>
          </draw:image>
          <svg:desc>preencoded.png</svg:desc>
        </draw:frame>
        <draw:custom-shape draw:name="Text 26" draw:style-name="gr57" draw:text-style-name="P7" draw:layer="layout" svg:width="4.062cm" svg:height="1.649cm" svg:x="20.269cm" svg:y="5.791cm">
          <text:p text:style-name="P6"><text:span text:style-name="T18">Retrospecti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8" draw:text-style-name="P7" draw:layer="layout" svg:width="4.062cm" svg:height="4.824cm" svg:x="20.269cm" svg:y="7.62cm">
          <text:p text:style-name="P6"><text:span text:style-name="T12">Reflexió: què ha funcionat i què cal millor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8" draw:text-style-name="P19" draw:layer="layout" svg:width="24.382cm" svg:height="0.709cm" svg:x="0.508cm" svg:y="13.25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9" draw:text-style-name="P7" draw:layer="layout" svg:width="24.382cm" svg:height="0.709cm" svg:x="0.508cm" svg:y="13.259cm">
          <text:p text:style-name="P6"><text:span text:style-name="T19">22 setmanes · 5 sprints · Equips de 3-4 pers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4" presentation:class="page"/>
          <draw:frame draw:name="PlaceHolder 2" presentation:style-name="pr5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5" draw:style-name="dp3" draw:master-page-name="Blank_20_Slide">
        <draw:custom-shape draw:name="Shape 0" draw:style-name="gr2" draw:text-style-name="P2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0" draw:text-style-name="P4" draw:layer="layout" svg:width="23.366cm" svg:height="2.03cm" svg:x="1.016cm" svg:y="0.381cm">
          <text:p text:style-name="P3"><text:span text:style-name="T7">Rols rotatius de l'equi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1" draw:text-style-name="P23" draw:layer="layout" svg:width="7.237cm" svg:height="8.452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8" draw:text-style-name="P19" draw:layer="layout" svg:width="7.237cm" svg:height="0.201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8" draw:text-style-name="P19" draw:layer="layout" svg:width="2.157cm" svg:height="2.157cm" svg:x="3.81cm" svg:y="3.3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5" draw:text-style-name="P10" draw:layer="layout" svg:width="1.751cm" svg:height="1.751cm" svg:x="4.013cm" svg:y="3.556cm">
          <draw:image xlink:href="Pictures/10000001000001000000010042DBA461.png" xlink:type="simple" xlink:show="embed" xlink:actuate="onLoad" draw:mime-type="image/png">
            <text:p/>
          </draw:image>
          <svg:desc>preencoded.png</svg:desc>
        </draw:frame>
        <draw:custom-shape draw:name="Text 6" draw:style-name="gr62" draw:text-style-name="P7" draw:layer="layout" svg:width="6.729cm" svg:height="1.268cm" svg:x="1.524cm" svg:y="5.715cm">
          <text:p text:style-name="P6"><text:span text:style-name="T20">Scrum Mas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3" draw:text-style-name="P24" draw:layer="layout" svg:width="3.173cm" svg:height="0.76cm" svg:x="3.302cm" svg:y="7.061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64" draw:text-style-name="P7" draw:layer="layout" svg:width="3.173cm" svg:height="0.76cm" svg:x="3.302cm" svg:y="7.061cm">
          <text:p text:style-name="P6"><text:span text:style-name="T21">Liderat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5" draw:text-style-name="P7" draw:layer="layout" svg:width="6.653cm" svg:height="4.062cm" svg:x="1.575cm" svg:y="8.077cm">
          <text:p text:style-name="P6"><text:span text:style-name="T22">Coordina l'equip, facilita les reunions de Scrum i és l'enllaç amb el professorat. Assegura que el procés funcion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1" draw:text-style-name="P23" draw:layer="layout" svg:width="7.237cm" svg:height="8.452cm" svg:x="9.14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7.237cm" svg:height="0.201cm" svg:x="9.14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2.157cm" svg:height="2.157cm" svg:x="11.684cm" svg:y="3.3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5" draw:text-style-name="P10" draw:layer="layout" svg:width="1.751cm" svg:height="1.751cm" svg:x="11.887cm" svg:y="3.556cm">
          <draw:image xlink:href="Pictures/10000001000001000000010039980ACF.png" xlink:type="simple" xlink:show="embed" xlink:actuate="onLoad" draw:mime-type="image/png">
            <text:p/>
          </draw:image>
          <svg:desc>preencoded.png</svg:desc>
        </draw:frame>
        <draw:custom-shape draw:name="Text 13" draw:style-name="gr66" draw:text-style-name="P7" draw:layer="layout" svg:width="6.729cm" svg:height="1.268cm" svg:x="9.398cm" svg:y="5.715cm">
          <text:p text:style-name="P6"><text:span text:style-name="T23">UI / Disse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67" draw:text-style-name="P25" draw:layer="layout" svg:width="3.173cm" svg:height="0.76cm" svg:x="11.176cm" svg:y="7.061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5" draw:style-name="gr68" draw:text-style-name="P7" draw:layer="layout" svg:width="3.173cm" svg:height="0.76cm" svg:x="11.176cm" svg:y="7.061cm">
          <text:p text:style-name="P6"><text:span text:style-name="T24">Creativit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9" draw:text-style-name="P7" draw:layer="layout" svg:width="6.653cm" svg:height="4.062cm" svg:x="9.449cm" svg:y="8.077cm">
          <text:p text:style-name="P6"><text:span text:style-name="T22">Cuida l'aspecte visual i l'experiència d'usuari de la web. Vetlla per la coherència i usabilitat de la interfíc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61" draw:text-style-name="P23" draw:layer="layout" svg:width="7.237cm" svg:height="8.452cm" svg:x="17.01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6" draw:text-style-name="P20" draw:layer="layout" svg:width="7.237cm" svg:height="0.201cm" svg:x="17.01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6" draw:text-style-name="P20" draw:layer="layout" svg:width="2.157cm" svg:height="2.157cm" svg:x="19.558cm" svg:y="3.3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5" draw:text-style-name="P10" draw:layer="layout" svg:width="1.751cm" svg:height="1.751cm" svg:x="19.761cm" svg:y="3.556cm">
          <draw:image xlink:href="Pictures/10000001000001000000010003F58B1D.png" xlink:type="simple" xlink:show="embed" xlink:actuate="onLoad" draw:mime-type="image/png">
            <text:p/>
          </draw:image>
          <svg:desc>preencoded.png</svg:desc>
        </draw:frame>
        <draw:custom-shape draw:name="Text 20" draw:style-name="gr70" draw:text-style-name="P7" draw:layer="layout" svg:width="6.729cm" svg:height="1.268cm" svg:x="17.272cm" svg:y="5.715cm">
          <text:p text:style-name="P6"><text:span text:style-name="T25">Documenta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71" draw:text-style-name="P26" draw:layer="layout" svg:width="3.173cm" svg:height="0.76cm" svg:x="19.05cm" svg:y="7.061cm">
          <text:p/>
          <draw:enhanced-geometry draw:mirror-horizontal="false" draw:mirror-vertical="false" draw:glue-points="?f8 0 0 ?f9 ?f8 ?f10 ?f11 ?f9" draw:text-areas="?f5 ?f5 ?f6 ?f7" svg:viewBox="0 0 0 0" draw:type="ooxml-roundRect" draw:modifiers="1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2" draw:style-name="gr72" draw:text-style-name="P7" draw:layer="layout" svg:width="3.173cm" svg:height="0.76cm" svg:x="19.05cm" svg:y="7.061cm">
          <text:p text:style-name="P6"><text:span text:style-name="T26">Organització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3" draw:text-style-name="P7" draw:layer="layout" svg:width="6.653cm" svg:height="4.062cm" svg:x="17.323cm" svg:y="8.077cm">
          <text:p text:style-name="P6"><text:span text:style-name="T22">Documenta les tasques desenvolupades, les decisions tècniques preses i el procés de treball de l'equip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74" draw:text-style-name="P15" draw:layer="layout" svg:width="22.858cm" svg:height="0.887cm" svg:x="1.27cm" svg:y="12.9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5" draw:text-style-name="P28" draw:layer="layout" svg:width="22.858cm" svg:height="0.887cm" svg:x="1.27cm" svg:y="12.954cm">
          <text:p text:style-name="P27"><text:span text:style-name="T27">Els rols canvien en cada sprint — tothom experimenta totes les responsabilitats al llarg del projec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76" draw:text-style-name="P15" draw:layer="layout" svg:width="22.5cm" svg:height="0.887cm" svg:x="1.5cm" svg:y="11.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29" draw:layer="layout" svg:width="15.601cm" svg:height="0.62cm" svg:x="8.399cm" svg:y="12cm">
          <draw:text-box>
            <text:p><text:span text:style-name="T28">El docent assumirà el rol de Product Owner (PO)</text:span></text:p>
          </draw:text-box>
        </draw:frame>
        <presentation:notes draw:style-name="dp2">
          <draw:page-thumbnail draw:name="PlaceHolder 1" draw:style-name="gr16" draw:layer="layout" svg:width="15.238cm" svg:height="8.571cm" svg:x="1.905cm" svg:y="3.175cm" draw:page-number="5" presentation:class="page"/>
          <draw:frame draw:name="PlaceHolder 2" presentation:style-name="pr6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6" draw:style-name="dp3" draw:master-page-name="Blank_20_Slide">
        <draw:custom-shape draw:name="Shape 0" draw:style-name="gr28" draw:text-style-name="P19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8" draw:text-style-name="P4" draw:layer="layout" svg:width="23.366cm" svg:height="2.03cm" svg:x="1.016cm" svg:y="0.381cm">
          <text:p text:style-name="P3"><text:span text:style-name="T7">Eines i tecnolog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1" draw:text-style-name="P15" draw:layer="layout" svg:width="7.618cm" svg:height="4.57cm" svg:x="0.762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9" draw:text-style-name="P30" draw:layer="layout" svg:width="2.538cm" svg:height="4.57cm" svg:x="0.762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5" draw:text-style-name="P10" draw:layer="layout" svg:width="1.522cm" svg:height="1.522cm" svg:x="1.27cm" svg:y="4.445cm">
          <draw:image xlink:href="Pictures/100000010000010000000100BA56FEDE.png" xlink:type="simple" xlink:show="embed" xlink:actuate="onLoad" draw:mime-type="image/png">
            <text:p/>
          </draw:image>
          <svg:desc>preencoded.png</svg:desc>
        </draw:frame>
        <draw:custom-shape draw:name="Text 5" draw:style-name="gr80" draw:text-style-name="P4" draw:layer="layout" svg:width="4.621cm" svg:height="1.141cm" svg:x="3.505cm" svg:y="3.683cm">
          <text:p text:style-name="P3"><text:span text:style-name="T29">React + Vi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1" draw:text-style-name="P4" draw:layer="layout" svg:width="4.621cm" svg:height="2.157cm" svg:x="3.505cm" svg:y="4.953cm">
          <text:p text:style-name="P3"><text:span text:style-name="T30">Framework i bundler de l'aplicació we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1" draw:text-style-name="P15" draw:layer="layout" svg:width="7.618cm" svg:height="4.57cm" svg:x="8.839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2" draw:text-style-name="P31" draw:layer="layout" svg:width="2.538cm" svg:height="4.57cm" svg:x="8.839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5" draw:text-style-name="P10" draw:layer="layout" svg:width="1.522cm" svg:height="1.522cm" svg:x="9.347cm" svg:y="4.445cm">
          <draw:image xlink:href="Pictures/10000001000001000000010098643175.png" xlink:type="simple" xlink:show="embed" xlink:actuate="onLoad" draw:mime-type="image/png">
            <text:p/>
          </draw:image>
          <svg:desc>preencoded.png</svg:desc>
        </draw:frame>
        <draw:custom-shape draw:name="Text 9" draw:style-name="gr83" draw:text-style-name="P4" draw:layer="layout" svg:width="4.621cm" svg:height="1.141cm" svg:x="11.582cm" svg:y="3.683cm">
          <text:p text:style-name="P3"><text:span text:style-name="T29">VS 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4" draw:text-style-name="P4" draw:layer="layout" svg:width="4.621cm" svg:height="2.157cm" svg:x="11.582cm" svg:y="4.953cm">
          <text:p text:style-name="P3"><text:span text:style-name="T30">Editor de codi amb extensions recomanad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1" draw:text-style-name="P15" draw:layer="layout" svg:width="7.618cm" svg:height="4.57cm" svg:x="16.916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5" draw:text-style-name="P32" draw:layer="layout" svg:width="2.538cm" svg:height="4.57cm" svg:x="16.916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5" draw:text-style-name="P10" draw:layer="layout" svg:width="1.522cm" svg:height="1.522cm" svg:x="17.424cm" svg:y="4.445cm">
          <draw:image xlink:href="Pictures/100000010000010000000100F29F55C8.png" xlink:type="simple" xlink:show="embed" xlink:actuate="onLoad" draw:mime-type="image/png">
            <text:p/>
          </draw:image>
          <svg:desc>preencoded.png</svg:desc>
        </draw:frame>
        <draw:custom-shape draw:name="Text 13" draw:style-name="gr86" draw:text-style-name="P4" draw:layer="layout" svg:width="4.621cm" svg:height="1.141cm" svg:x="19.66cm" svg:y="3.683cm">
          <text:p text:style-name="P3"><text:span text:style-name="T29">Git / Git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7" draw:text-style-name="P4" draw:layer="layout" svg:width="4.621cm" svg:height="2.157cm" svg:x="19.66cm" svg:y="4.953cm">
          <text:p text:style-name="P3"><text:span text:style-name="T30">Control de versions i treball col·laborati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1" draw:text-style-name="P15" draw:layer="layout" svg:width="7.618cm" svg:height="4.57cm" svg:x="0.7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8" draw:text-style-name="P33" draw:layer="layout" svg:width="2.538cm" svg:height="4.57cm" svg:x="0.7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5" draw:text-style-name="P10" draw:layer="layout" svg:width="1.522cm" svg:height="1.522cm" svg:x="1.27cm" svg:y="9.652cm">
          <draw:image xlink:href="Pictures/10000001000001000000010046AACCDD.png" xlink:type="simple" xlink:show="embed" xlink:actuate="onLoad" draw:mime-type="image/png">
            <text:p/>
          </draw:image>
          <svg:desc>preencoded.png</svg:desc>
        </draw:frame>
        <draw:custom-shape draw:name="Text 17" draw:style-name="gr89" draw:text-style-name="P4" draw:layer="layout" svg:width="4.621cm" svg:height="1.141cm" svg:x="3.505cm" svg:y="8.89cm">
          <text:p text:style-name="P3"><text:span text:style-name="T29">Trell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0" draw:text-style-name="P4" draw:layer="layout" svg:width="4.621cm" svg:height="2.157cm" svg:x="3.505cm" svg:y="10.16cm">
          <text:p text:style-name="P3"><text:span text:style-name="T30">Tauler Kanban per gestionar les tasqu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1" draw:text-style-name="P15" draw:layer="layout" svg:width="7.618cm" svg:height="4.57cm" svg:x="8.83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1" draw:text-style-name="P34" draw:layer="layout" svg:width="2.538cm" svg:height="4.57cm" svg:x="8.83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5" draw:text-style-name="P10" draw:layer="layout" svg:width="1.522cm" svg:height="1.522cm" svg:x="9.347cm" svg:y="9.652cm">
          <draw:image xlink:href="Pictures/10000001000001000000010092B9B518.png" xlink:type="simple" xlink:show="embed" xlink:actuate="onLoad" draw:mime-type="image/png">
            <text:p/>
          </draw:image>
          <svg:desc>preencoded.png</svg:desc>
        </draw:frame>
        <draw:custom-shape draw:name="Text 21" draw:style-name="gr92" draw:text-style-name="P4" draw:layer="layout" svg:width="4.621cm" svg:height="1.141cm" svg:x="11.582cm" svg:y="8.89cm">
          <text:p text:style-name="P3"><text:span text:style-name="T29">DevToo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3" draw:text-style-name="P4" draw:layer="layout" svg:width="4.621cm" svg:height="2.157cm" svg:x="11.582cm" svg:y="10.16cm">
          <text:p text:style-name="P3"><text:span text:style-name="T30">Depuració i proves en Chrome / Firefo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1" draw:text-style-name="P15" draw:layer="layout" svg:width="7.618cm" svg:height="4.57cm" svg:x="16.916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94" draw:text-style-name="P35" draw:layer="layout" svg:width="2.538cm" svg:height="4.57cm" svg:x="16.916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5" draw:text-style-name="P10" draw:layer="layout" svg:width="1.522cm" svg:height="1.522cm" svg:x="17.424cm" svg:y="9.652cm">
          <draw:image xlink:href="Pictures/1000000100000100000001000DC0678C.png" xlink:type="simple" xlink:show="embed" xlink:actuate="onLoad" draw:mime-type="image/png">
            <text:p/>
          </draw:image>
          <svg:desc>preencoded.png</svg:desc>
        </draw:frame>
        <draw:custom-shape draw:name="Text 25" draw:style-name="gr95" draw:text-style-name="P4" draw:layer="layout" svg:width="4.621cm" svg:height="1.141cm" svg:x="19.66cm" svg:y="8.89cm">
          <text:p text:style-name="P3"><text:span text:style-name="T29">Leafl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96" draw:text-style-name="P4" draw:layer="layout" svg:width="4.621cm" svg:height="2.157cm" svg:x="19.66cm" svg:y="10.16cm">
          <text:p text:style-name="P3"><text:span text:style-name="T30">Mapa interactiu per ubicar els comerç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6" presentation:class="page"/>
          <draw:frame draw:name="PlaceHolder 2" presentation:style-name="pr7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7" draw:style-name="dp3" draw:master-page-name="Blank_20_Slide">
        <draw:custom-shape draw:name="Shape 0" draw:style-name="gr97" draw:text-style-name="P2" draw:layer="layout" svg:width="25.398cm" svg:height="2.5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8" draw:text-style-name="P4" draw:layer="layout" svg:width="23.366cm" svg:height="2.03cm" svg:x="1.016cm" svg:y="0.381cm">
          <text:p text:style-name="P3"><text:span text:style-name="T7">Competències que assolire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1.555cm" svg:height="1.268cm" svg:x="0.762cm" svg:y="2.7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9" draw:text-style-name="P7" draw:layer="layout" svg:width="11.555cm" svg:height="1.268cm" svg:x="0.762cm" svg:y="2.848cm">
          <text:p text:style-name="P6"><text:span text:style-name="T8">Tècniques (RA 1-7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74" draw:text-style-name="P15" draw:layer="layout" svg:width="11.555cm" svg:height="1.217cm" svg:x="0.762cm" svg:y="4.2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5" draw:text-style-name="P10" draw:layer="layout" svg:width="0.709cm" svg:height="0.709cm" svg:x="0.965cm" svg:y="4.575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6" draw:style-name="gr100" draw:text-style-name="P4" draw:layer="layout" svg:width="10.285cm" svg:height="0.963cm" svg:x="1.829cm" svg:y="4.474cm">
          <text:p text:style-name="P3"><text:span text:style-name="T31">JavaScript ES6+ (variables, funcions, OOP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1" draw:text-style-name="P36" draw:layer="layout" svg:width="11.555cm" svg:height="1.217cm" svg:x="0.762cm" svg:y="5.6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5" draw:text-style-name="P10" draw:layer="layout" svg:width="0.709cm" svg:height="0.709cm" svg:x="0.965cm" svg:y="5.972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8" draw:style-name="gr102" draw:text-style-name="P4" draw:layer="layout" svg:width="10.285cm" svg:height="0.963cm" svg:x="1.829cm" svg:y="5.871cm">
          <text:p text:style-name="P3"><text:span text:style-name="T31">Manipulació dinàmica del DO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4" draw:text-style-name="P15" draw:layer="layout" svg:width="11.555cm" svg:height="1.217cm" svg:x="0.762cm" svg:y="7.0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5" draw:text-style-name="P10" draw:layer="layout" svg:width="0.709cm" svg:height="0.709cm" svg:x="0.965cm" svg:y="7.369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10" draw:style-name="gr103" draw:text-style-name="P4" draw:layer="layout" svg:width="10.285cm" svg:height="0.963cm" svg:x="1.829cm" svg:y="7.268cm">
          <text:p text:style-name="P3"><text:span text:style-name="T31">Esdeveniments i validació de formular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1" draw:text-style-name="P36" draw:layer="layout" svg:width="11.555cm" svg:height="1.217cm" svg:x="0.762cm" svg:y="8.4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5" draw:text-style-name="P10" draw:layer="layout" svg:width="0.709cm" svg:height="0.709cm" svg:x="0.965cm" svg:y="8.766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12" draw:style-name="gr104" draw:text-style-name="P4" draw:layer="layout" svg:width="10.285cm" svg:height="0.963cm" svg:x="1.829cm" svg:y="8.665cm">
          <text:p text:style-name="P3"><text:span text:style-name="T31">Comunicació asíncrona (Fetch, async/awai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4" draw:text-style-name="P15" draw:layer="layout" svg:width="11.555cm" svg:height="1.217cm" svg:x="0.762cm" svg:y="9.8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5" draw:text-style-name="P10" draw:layer="layout" svg:width="0.709cm" svg:height="0.709cm" svg:x="0.965cm" svg:y="10.163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14" draw:style-name="gr105" draw:text-style-name="P4" draw:layer="layout" svg:width="10.285cm" svg:height="0.963cm" svg:x="1.829cm" svg:y="10.062cm">
          <text:p text:style-name="P3"><text:span text:style-name="T31">React: components, estat i cicle de vi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1" draw:text-style-name="P36" draw:layer="layout" svg:width="11.555cm" svg:height="1.217cm" svg:x="0.762cm" svg:y="11.2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5" draw:text-style-name="P10" draw:layer="layout" svg:width="0.709cm" svg:height="0.709cm" svg:x="0.965cm" svg:y="11.56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16" draw:style-name="gr106" draw:text-style-name="P4" draw:layer="layout" svg:width="10.285cm" svg:height="0.963cm" svg:x="1.829cm" svg:y="11.459cm">
          <text:p text:style-name="P3"><text:span text:style-name="T31">Control de versions amb Git i Git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6" draw:text-style-name="P20" draw:layer="layout" svg:width="11.555cm" svg:height="1.268cm" svg:x="13.081cm" svg:y="2.8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07" draw:text-style-name="P7" draw:layer="layout" svg:width="11.555cm" svg:height="1.268cm" svg:x="13.081cm" svg:y="2.848cm">
          <text:p text:style-name="P6"><text:span text:style-name="T8">Transversals (Art. 5 RD 405/2023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74" draw:text-style-name="P15" draw:layer="layout" svg:width="11.555cm" svg:height="1.217cm" svg:x="13.081cm" svg:y="4.3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5" draw:text-style-name="P10" draw:layer="layout" svg:width="0.709cm" svg:height="0.709cm" svg:x="13.284cm" svg:y="4.575cm">
          <draw:image xlink:href="Pictures/1000000100000080000000807A012047.png" xlink:type="simple" xlink:show="embed" xlink:actuate="onLoad" draw:mime-type="image/png">
            <text:p/>
          </draw:image>
          <svg:desc>preencoded.png</svg:desc>
        </draw:frame>
        <draw:custom-shape draw:name="Text 20" draw:style-name="gr108" draw:text-style-name="P4" draw:layer="layout" svg:width="10.285cm" svg:height="0.963cm" svg:x="14.148cm" svg:y="4.474cm">
          <text:p text:style-name="P3"><text:span text:style-name="T31">Treball en equip i col·laboració acti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01" draw:text-style-name="P36" draw:layer="layout" svg:width="11.555cm" svg:height="1.217cm" svg:x="13.081cm" svg:y="5.7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5" draw:text-style-name="P10" draw:layer="layout" svg:width="0.709cm" svg:height="0.709cm" svg:x="13.284cm" svg:y="5.972cm">
          <draw:image xlink:href="Pictures/1000000100000080000000807A012047.png" xlink:type="simple" xlink:show="embed" xlink:actuate="onLoad" draw:mime-type="image/png">
            <text:p/>
          </draw:image>
          <svg:desc>preencoded.png</svg:desc>
        </draw:frame>
        <draw:custom-shape draw:name="Text 22" draw:style-name="gr109" draw:text-style-name="P4" draw:layer="layout" svg:width="10.285cm" svg:height="0.963cm" svg:x="14.148cm" svg:y="5.871cm">
          <text:p text:style-name="P3"><text:span text:style-name="T31">Autonomia i iniciativa en la resolució de problem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74" draw:text-style-name="P15" draw:layer="layout" svg:width="11.555cm" svg:height="1.217cm" svg:x="13.081cm" svg:y="7.1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15" draw:text-style-name="P10" draw:layer="layout" svg:width="0.709cm" svg:height="0.709cm" svg:x="13.284cm" svg:y="7.369cm">
          <draw:image xlink:href="Pictures/1000000100000080000000807A012047.png" xlink:type="simple" xlink:show="embed" xlink:actuate="onLoad" draw:mime-type="image/png">
            <text:p/>
          </draw:image>
          <svg:desc>preencoded.png</svg:desc>
        </draw:frame>
        <draw:custom-shape draw:name="Text 24" draw:style-name="gr110" draw:text-style-name="P4" draw:layer="layout" svg:width="10.285cm" svg:height="0.963cm" svg:x="14.148cm" svg:y="7.268cm">
          <text:p text:style-name="P3"><text:span text:style-name="T31">Comunicació efectiva i presentació de resulta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01" draw:text-style-name="P36" draw:layer="layout" svg:width="11.555cm" svg:height="1.217cm" svg:x="13.081cm" svg:y="8.5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5" draw:text-style-name="P10" draw:layer="layout" svg:width="0.709cm" svg:height="0.709cm" svg:x="13.284cm" svg:y="8.766cm">
          <draw:image xlink:href="Pictures/1000000100000080000000807A012047.png" xlink:type="simple" xlink:show="embed" xlink:actuate="onLoad" draw:mime-type="image/png">
            <text:p/>
          </draw:image>
          <svg:desc>preencoded.png</svg:desc>
        </draw:frame>
        <draw:custom-shape draw:name="Text 26" draw:style-name="gr111" draw:text-style-name="P4" draw:layer="layout" svg:width="10.285cm" svg:height="0.963cm" svg:x="14.148cm" svg:y="8.665cm">
          <text:p text:style-name="P3"><text:span text:style-name="T31">Documentació del procés de desenvolupa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74" draw:text-style-name="P15" draw:layer="layout" svg:width="11.555cm" svg:height="1.217cm" svg:x="13.081cm" svg:y="9.9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5" draw:text-style-name="P10" draw:layer="layout" svg:width="0.709cm" svg:height="0.709cm" svg:x="13.284cm" svg:y="10.163cm">
          <draw:image xlink:href="Pictures/1000000100000080000000807A012047.png" xlink:type="simple" xlink:show="embed" xlink:actuate="onLoad" draw:mime-type="image/png">
            <text:p/>
          </draw:image>
          <svg:desc>preencoded.png</svg:desc>
        </draw:frame>
        <draw:custom-shape draw:name="Text 28" draw:style-name="gr112" draw:text-style-name="P4" draw:layer="layout" svg:width="10.285cm" svg:height="0.963cm" svg:x="14.148cm" svg:y="10.062cm">
          <text:p text:style-name="P3"><text:span text:style-name="T31">Adaptació al canvi i formació contínu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01" draw:text-style-name="P36" draw:layer="layout" svg:width="11.555cm" svg:height="1.217cm" svg:x="13.081cm" svg:y="11.3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15" draw:text-style-name="P10" draw:layer="layout" svg:width="0.709cm" svg:height="0.709cm" svg:x="13.284cm" svg:y="11.56cm">
          <draw:image xlink:href="Pictures/1000000100000080000000807A012047.png" xlink:type="simple" xlink:show="embed" xlink:actuate="onLoad" draw:mime-type="image/png">
            <text:p/>
          </draw:image>
          <svg:desc>preencoded.png</svg:desc>
        </draw:frame>
        <draw:custom-shape draw:name="Text 30" draw:style-name="gr113" draw:text-style-name="P4" draw:layer="layout" svg:width="10.285cm" svg:height="0.963cm" svg:x="14.148cm" svg:y="11.459cm">
          <text:p text:style-name="P3"><text:span text:style-name="T31">Gestió de la qualitat i plans de pro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14" draw:text-style-name="P1" draw:layer="layout" svg:width="25.398cm" svg:height="0.568cm" svg:x="0cm" svg:y="13.8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5" draw:text-style-name="P29" draw:layer="layout" svg:width="9.41cm" svg:height="0.57cm" svg:x="8.09cm" svg:y="13.818cm">
          <draw:text-box>
            <text:p><text:span text:style-name="T32">Mòdul 0612 — Desenvolupament Web en Entorn Client · CFGS DAW</text:span></text:p>
          </draw:text-box>
        </draw:frame>
        <draw:custom-shape draw:name="Shape 33" draw:style-name="gr116" draw:text-style-name="P15" draw:layer="layout" svg:width="11.555cm" svg:height="1.217cm" svg:x="0.762cm" svg:y="12.5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15" draw:text-style-name="P10" draw:layer="layout" svg:width="0.709cm" svg:height="0.709cm" svg:x="1cm" svg:y="12.791cm">
          <draw:image xlink:href="Pictures/100000010000008000000080E50295C8.png" xlink:type="simple" xlink:show="embed" xlink:actuate="onLoad" draw:mime-type="image/png">
            <text:p/>
          </draw:image>
          <svg:desc>preencoded.png</svg:desc>
        </draw:frame>
        <draw:custom-shape draw:name="Text 31" draw:style-name="gr117" draw:text-style-name="P4" draw:layer="layout" svg:width="10.285cm" svg:height="0.963cm" svg:x="1.715cm" svg:y="12.777cm">
          <text:p text:style-name="P3"><text:span text:style-name="T31">Control de versions amb Git i Git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7" presentation:class="page"/>
          <draw:frame draw:name="PlaceHolder 2" presentation:style-name="pr8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8" draw:style-name="dp3" draw:master-page-name="Blank_20_Slide">
        <draw:custom-shape draw:name="Shape 0" draw:style-name="gr28" draw:text-style-name="P19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8" draw:text-style-name="P4" draw:layer="layout" svg:width="23.366cm" svg:height="2.03cm" svg:x="1.016cm" svg:y="0.381cm">
          <text:p text:style-name="P3"><text:span text:style-name="T7">5 Sprints · 22 setma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.522cm" svg:height="1.522cm" svg:x="0.635cm" svg:y="3.25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19" draw:text-style-name="P7" draw:layer="layout" svg:width="1.522cm" svg:height="1.522cm" svg:x="0.635cm" svg:y="3.251cm">
          <text:p text:style-name="P6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0" draw:text-style-name="P37" draw:layer="layout" svg:width="0.201cm" svg:height="0.557cm" svg:x="1.295cm" svg:y="4.7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1" draw:text-style-name="P15" draw:layer="layout" svg:width="22.096cm" svg:height="1.954cm" svg:x="2.54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" draw:text-style-name="P2" draw:layer="layout" svg:width="0.176cm" svg:height="1.954cm" svg:x="2.54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1" draw:text-style-name="P4" draw:layer="layout" svg:width="4.062cm" svg:height="0.76cm" svg:x="2.921cm" svg:y="3.15cm">
          <text:p text:style-name="P3"><text:span text:style-name="T34">Setmanes 1-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2" draw:text-style-name="P4" draw:layer="layout" svg:width="7.618cm" svg:height="0.811cm" svg:x="2.921cm" svg:y="3.886cm">
          <text:p text:style-name="P3"><text:span text:style-name="T29">Sprint 1: Planificació i disse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3" draw:text-style-name="P4" draw:layer="layout" svg:width="13.206cm" svg:height="1.344cm" svg:x="10.922cm" svg:y="3.302cm">
          <text:p text:style-name="P3"><text:span text:style-name="T22">JavaScript, DOM, Git i configuració del projec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6" draw:text-style-name="P20" draw:layer="layout" svg:width="1.522cm" svg:height="1.522cm" svg:x="0.635cm" svg:y="5.38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24" draw:text-style-name="P7" draw:layer="layout" svg:width="1.522cm" svg:height="1.522cm" svg:x="0.635cm" svg:y="5.385cm">
          <text:p text:style-name="P6"><text:span text:style-name="T33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0" draw:text-style-name="P37" draw:layer="layout" svg:width="0.201cm" svg:height="0.557cm" svg:x="1.295cm" svg:y="6.9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25" draw:text-style-name="P36" draw:layer="layout" svg:width="22.096cm" svg:height="1.954cm" svg:x="2.54cm" svg:y="5.1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6" draw:text-style-name="P20" draw:layer="layout" svg:width="0.176cm" svg:height="1.954cm" svg:x="2.54cm" svg:y="5.1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6" draw:text-style-name="P4" draw:layer="layout" svg:width="4.062cm" svg:height="0.76cm" svg:x="2.921cm" svg:y="5.283cm">
          <text:p text:style-name="P3"><text:span text:style-name="T26">Setmanes 3-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7" draw:text-style-name="P4" draw:layer="layout" svg:width="7.618cm" svg:height="0.811cm" svg:x="2.921cm" svg:y="6.02cm">
          <text:p text:style-name="P3"><text:span text:style-name="T29">Sprint 2: Estructura i maquetació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8" draw:text-style-name="P4" draw:layer="layout" svg:width="13.206cm" svg:height="1.344cm" svg:x="10.922cm" svg:y="5.436cm">
          <text:p text:style-name="P3"><text:span text:style-name="T22">Esdeveniments, formularis, validació i AP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1.522cm" svg:height="1.522cm" svg:x="0.635cm" svg:y="7.51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129" draw:text-style-name="P7" draw:layer="layout" svg:width="1.522cm" svg:height="1.522cm" svg:x="0.635cm" svg:y="7.518cm">
          <text:p text:style-name="P6"><text:span text:style-name="T33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20" draw:text-style-name="P37" draw:layer="layout" svg:width="0.201cm" svg:height="0.557cm" svg:x="1.295cm" svg:y="9.0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31" draw:text-style-name="P15" draw:layer="layout" svg:width="22.096cm" svg:height="1.954cm" svg:x="2.54cm" svg:y="7.2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" draw:text-style-name="P1" draw:layer="layout" svg:width="0.176cm" svg:height="1.954cm" svg:x="2.54cm" svg:y="7.2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30" draw:text-style-name="P4" draw:layer="layout" svg:width="4.062cm" svg:height="0.76cm" svg:x="2.921cm" svg:y="7.417cm">
          <text:p text:style-name="P3"><text:span text:style-name="T24">Setmanes 6-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31" draw:text-style-name="P4" draw:layer="layout" svg:width="7.618cm" svg:height="0.811cm" svg:x="2.921cm" svg:y="8.153cm">
          <text:p text:style-name="P3"><text:span text:style-name="T29">Sprint 3: Lògica JavaScrip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32" draw:text-style-name="P4" draw:layer="layout" svg:width="13.206cm" svg:height="1.344cm" svg:x="10.922cm" svg:y="7.569cm">
          <text:p text:style-name="P3"><text:span text:style-name="T22">Fetch, async/await, JSON i comunicació asíncro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43" draw:text-style-name="P21" draw:layer="layout" svg:width="1.522cm" svg:height="1.522cm" svg:x="0.635cm" svg:y="9.65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8" draw:style-name="gr133" draw:text-style-name="P7" draw:layer="layout" svg:width="1.522cm" svg:height="1.522cm" svg:x="0.635cm" svg:y="9.652cm">
          <text:p text:style-name="P6"><text:span text:style-name="T3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20" draw:text-style-name="P37" draw:layer="layout" svg:width="0.201cm" svg:height="0.557cm" svg:x="1.295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25" draw:text-style-name="P36" draw:layer="layout" svg:width="22.096cm" svg:height="1.954cm" svg:x="2.54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3" draw:text-style-name="P21" draw:layer="layout" svg:width="0.176cm" svg:height="1.954cm" svg:x="2.54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34" draw:text-style-name="P4" draw:layer="layout" svg:width="4.062cm" svg:height="0.76cm" svg:x="2.921cm" svg:y="9.55cm">
          <text:p text:style-name="P3"><text:span text:style-name="T35">Setm. 13-1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35" draw:text-style-name="P4" draw:layer="layout" svg:width="7.618cm" svg:height="0.811cm" svg:x="2.921cm" svg:y="10.287cm">
          <text:p text:style-name="P3"><text:span text:style-name="T29">Sprint 4: Interactivitat i DO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36" draw:text-style-name="P4" draw:layer="layout" svg:width="13.206cm" svg:height="1.344cm" svg:x="10.922cm" svg:y="9.703cm">
          <text:p text:style-name="P3"><text:span text:style-name="T22">Components, estat, cicle de vida i React Rou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56" draw:text-style-name="P22" draw:layer="layout" svg:width="1.522cm" svg:height="1.522cm" svg:x="0.635cm" svg:y="11.78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6" draw:style-name="gr137" draw:text-style-name="P7" draw:layer="layout" svg:width="1.522cm" svg:height="1.522cm" svg:x="0.635cm" svg:y="11.786cm">
          <text:p text:style-name="P6"><text:span text:style-name="T33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31" draw:text-style-name="P15" draw:layer="layout" svg:width="22.096cm" svg:height="1.954cm" svg:x="2.54cm" svg:y="11.5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56" draw:text-style-name="P22" draw:layer="layout" svg:width="0.176cm" svg:height="1.954cm" svg:x="2.54cm" svg:y="11.5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38" draw:text-style-name="P4" draw:layer="layout" svg:width="4.062cm" svg:height="0.76cm" svg:x="2.921cm" svg:y="11.684cm">
          <text:p text:style-name="P3"><text:span text:style-name="T36">Setm. 20-2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39" draw:text-style-name="P4" draw:layer="layout" svg:width="7.618cm" svg:height="0.811cm" svg:x="2.921cm" svg:y="12.421cm">
          <text:p text:style-name="P3"><text:span text:style-name="T29">Sprint 5: Comunicació asíncro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40" draw:text-style-name="P4" draw:layer="layout" svg:width="13.206cm" svg:height="1.344cm" svg:x="10.922cm" svg:y="11.836cm">
          <text:p text:style-name="P3"><text:span text:style-name="T22">Posada en producció, testing i presentació fi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8" presentation:class="page"/>
          <draw:frame draw:name="PlaceHolder 2" presentation:style-name="pr9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9" draw:style-name="dp3" draw:master-page-name="Blank_20_Slide">
        <draw:custom-shape draw:name="Shape 0" draw:style-name="gr2" draw:text-style-name="P2" draw:layer="layout" svg:width="25.398cm" svg:height="2.7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8cm" svg:height="0.17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1" draw:text-style-name="P4" draw:layer="layout" svg:width="23.366cm" svg:height="2.03cm" svg:x="1.016cm" svg:y="0.381cm">
          <text:p text:style-name="P3"><text:span text:style-name="T7">Com s'avalua el project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1" draw:text-style-name="P15" draw:layer="layout" svg:width="7.618cm" svg:height="8.888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" draw:text-style-name="P2" draw:layer="layout" svg:width="7.618cm" svg:height="1.649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5" draw:text-style-name="P10" draw:layer="layout" svg:width="1.268cm" svg:height="1.268cm" svg:x="1.016cm" svg:y="3.226cm">
          <draw:image xlink:href="Pictures/100000010000010000000100228F73E6.png" xlink:type="simple" xlink:show="embed" xlink:actuate="onLoad" draw:mime-type="image/png">
            <text:p/>
          </draw:image>
          <svg:desc>preencoded.png</svg:desc>
        </draw:frame>
        <draw:custom-shape draw:name="Text 5" draw:style-name="gr142" draw:text-style-name="P4" draw:layer="layout" svg:width="5.713cm" svg:height="1.522cm" svg:x="2.413cm" svg:y="3.124cm">
          <text:p text:style-name="P3"><text:span text:style-name="T37">Activitats de cada spr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3" draw:text-style-name="P39" draw:layer="layout" svg:width="6.856cm" svg:height="6.348cm" svg:x="1.143cm" svg:y="5.029cm">
          <text:list text:style-name="L7">
            <text:list-item>
              <text:p text:style-name="P38"><text:span text:style-name="T38">Activitats vinculades al tauler Trello</text:span></text:p>
            </text:list-item>
            <text:list-item>
              <text:p text:style-name="P38"><text:span text:style-name="T38">Cada activitat avalua criteris dels RA</text:span></text:p>
            </text:list-item>
            <text:list-item>
              <text:p text:style-name="P38"><text:span text:style-name="T38">Determinen la qualificació de cada criteri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1" draw:text-style-name="P15" draw:layer="layout" svg:width="7.618cm" svg:height="8.888cm" svg:x="8.839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6" draw:text-style-name="P22" draw:layer="layout" svg:width="7.618cm" svg:height="1.649cm" svg:x="8.839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5" draw:text-style-name="P10" draw:layer="layout" svg:width="1.268cm" svg:height="1.268cm" svg:x="9.093cm" svg:y="3.226cm">
          <draw:image xlink:href="Pictures/1000000100000100000001005D53C44C.png" xlink:type="simple" xlink:show="embed" xlink:actuate="onLoad" draw:mime-type="image/png">
            <text:p/>
          </draw:image>
          <svg:desc>preencoded.png</svg:desc>
        </draw:frame>
        <draw:custom-shape draw:name="Text 9" draw:style-name="gr144" draw:text-style-name="P4" draw:layer="layout" svg:width="5.713cm" svg:height="1.522cm" svg:x="10.49cm" svg:y="3.124cm">
          <text:p text:style-name="P3"><text:span text:style-name="T37">Entrega final del projec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5" draw:text-style-name="P39" draw:layer="layout" svg:width="6.856cm" svg:height="6.348cm" svg:x="9.22cm" svg:y="5.029cm">
          <text:list text:style-name="L7">
            <text:list-item>
              <text:p text:style-name="P38"><text:span text:style-name="T38">Web completa i funcional</text:span></text:p>
            </text:list-item>
            <text:list-item>
              <text:p text:style-name="P38"><text:span text:style-name="T38">Producte integrador de tot el treball</text:span></text:p>
            </text:list-item>
            <text:list-item>
              <text:p text:style-name="P38"><text:span text:style-name="T38">Presentació davant el professorat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1" draw:text-style-name="P15" draw:layer="layout" svg:width="7.618cm" svg:height="8.888cm" svg:x="16.916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6" draw:text-style-name="P20" draw:layer="layout" svg:width="7.618cm" svg:height="1.649cm" svg:x="16.916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5" draw:text-style-name="P10" draw:layer="layout" svg:width="1.268cm" svg:height="1.268cm" svg:x="17.17cm" svg:y="3.226cm">
          <draw:image xlink:href="Pictures/100000010000010000000100DED37C24.png" xlink:type="simple" xlink:show="embed" xlink:actuate="onLoad" draw:mime-type="image/png">
            <text:p/>
          </draw:image>
          <svg:desc>preencoded.png</svg:desc>
        </draw:frame>
        <draw:custom-shape draw:name="Text 13" draw:style-name="gr146" draw:text-style-name="P4" draw:layer="layout" svg:width="5.713cm" svg:height="1.522cm" svg:x="18.567cm" svg:y="3.124cm">
          <text:p text:style-name="P3"><text:span text:style-name="T37">Procés de trebal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7" draw:text-style-name="P39" draw:layer="layout" svg:width="6.856cm" svg:height="6.348cm" svg:x="17.297cm" svg:y="5.029cm">
          <text:list text:style-name="L7">
            <text:list-item>
              <text:p text:style-name="P38"><text:span text:style-name="T38">Ús correcte del tauler Kanban</text:span></text:p>
            </text:list-item>
            <text:list-item>
              <text:p text:style-name="P38"><text:span text:style-name="T38">Participació en les cerimònies Scrum</text:span></text:p>
            </text:list-item>
            <text:list-item>
              <text:p text:style-name="P38"><text:span text:style-name="T38">Col·laboració i contribució en equip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23.874cm" svg:height="1.395cm" svg:x="0.762cm" svg:y="12.3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8" draw:text-style-name="P7" draw:layer="layout" svg:width="23.874cm" svg:height="1.395cm" svg:x="0.762cm" svg:y="12.319cm">
          <text:p text:style-name="P6"><text:span text:style-name="T13">⚠️ <text:s/>Per superar el projecte cal obtindre un mínim de 5/10 i no tindre cap criteri amb qualificació d'insufici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9" presentation:class="page"/>
          <draw:frame draw:name="PlaceHolder 2" presentation:style-name="pr10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10" draw:style-name="dp1" draw:master-page-name="Blank_20_Slide">
        <draw:custom-shape draw:name="Shape 0" draw:style-name="gr1" draw:text-style-name="P1" draw:layer="layout" svg:width="25.398cm" svg:height="0.20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9" draw:text-style-name="P7" draw:layer="layout" svg:width="22.858cm" svg:height="3.808cm" svg:x="1.27cm" svg:y="1.778cm">
          <text:p text:style-name="P6"><text:span text:style-name="T39">Endavant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0" draw:text-style-name="P7" draw:layer="layout" svg:width="21.334cm" svg:height="3.046cm" svg:x="2.032cm" svg:y="5.588cm">
          <text:p text:style-name="P6"><text:span text:style-name="T40">Prepara't per construir una aplicació web completa</text:span></text:p>
          <text:p text:style-name="P6"><text:span text:style-name="T40">que pot marcar la diferència al teu municip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3.046cm" svg:height="3.046cm" svg:x="4.064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5" draw:text-style-name="P10" draw:layer="layout" svg:width="2.132cm" svg:height="2.132cm" svg:x="4.521cm" svg:y="9.347cm">
          <draw:image xlink:href="Pictures/1000000100000100000001007FFB8988.png" xlink:type="simple" xlink:show="embed" xlink:actuate="onLoad" draw:mime-type="image/png">
            <text:p/>
          </draw:image>
          <svg:desc>preencoded.png</svg:desc>
        </draw:frame>
        <draw:custom-shape draw:name="Text 4" draw:style-name="gr151" draw:text-style-name="P7" draw:layer="layout" svg:width="7.11cm" svg:height="1.776cm" svg:x="2.032cm" svg:y="12.141cm">
          <text:p text:style-name="P6"><text:span text:style-name="T41">Aprendràs les</text:span></text:p>
          <text:p text:style-name="P6"><text:span text:style-name="T41">tecnologies del sec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3.046cm" svg:height="3.046cm" svg:x="11.938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5" draw:text-style-name="P10" draw:layer="layout" svg:width="2.132cm" svg:height="2.132cm" svg:x="12.395cm" svg:y="9.347cm">
          <draw:image xlink:href="Pictures/10000001000001000000010047D0D916.png" xlink:type="simple" xlink:show="embed" xlink:actuate="onLoad" draw:mime-type="image/png">
            <text:p/>
          </draw:image>
          <svg:desc>preencoded.png</svg:desc>
        </draw:frame>
        <draw:custom-shape draw:name="Text 6" draw:style-name="gr152" draw:text-style-name="P7" draw:layer="layout" svg:width="7.11cm" svg:height="1.776cm" svg:x="9.906cm" svg:y="12.141cm">
          <text:p text:style-name="P6"><text:span text:style-name="T41">Treballaràs en equip</text:span></text:p>
          <text:p text:style-name="P6"><text:span text:style-name="T41">com els profession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" draw:text-style-name="P2" draw:layer="layout" svg:width="3.046cm" svg:height="3.046cm" svg:x="19.812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5" draw:text-style-name="P10" draw:layer="layout" svg:width="2.132cm" svg:height="2.132cm" svg:x="20.269cm" svg:y="9.347cm">
          <draw:image xlink:href="Pictures/100000010000010000000100A7F3FFF9.png" xlink:type="simple" xlink:show="embed" xlink:actuate="onLoad" draw:mime-type="image/png">
            <text:p/>
          </draw:image>
          <svg:desc>preencoded.png</svg:desc>
        </draw:frame>
        <draw:custom-shape draw:name="Text 8" draw:style-name="gr153" draw:text-style-name="P7" draw:layer="layout" svg:width="7.11cm" svg:height="1.776cm" svg:x="17.78cm" svg:y="12.141cm">
          <text:p text:style-name="P6"><text:span text:style-name="T41">Crearàs quelcom amb</text:span></text:p>
          <text:p text:style-name="P6"><text:span text:style-name="T41">impacte 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25.398cm" svg:height="0.392cm" svg:x="0cm" svg:y="13.8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4" draw:text-style-name="P7" draw:layer="layout" svg:width="25.398cm" svg:height="0.392cm" svg:x="0cm" svg:y="13.894cm">
          <text:p text:style-name="P6"><text:span text:style-name="T42">Mòdul 0612 — Desenvolupament Web en Entorn Client · CFGS DA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5.238cm" svg:height="8.571cm" svg:x="1.905cm" svg:y="3.175cm" draw:page-number="10" presentation:class="page"/>
          <draw:frame draw:name="PlaceHolder 2" presentation:style-name="pr11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_20_over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Content_20_over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cm" svg:height="0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4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cm" svg:height="0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6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359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359cm" svg:height="3.951cm" svg:x="8.999cm" svg:y="3.343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359cm" svg:height="3.951cm" svg:x="16.728cm" svg:y="3.343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359cm" svg:height="3.951cm" svg:x="1.27cm" svg:y="7.672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359cm" svg:height="3.951cm" svg:x="8.999cm" svg:y="7.672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359cm" svg:height="3.951cm" svg:x="16.728cm" svg:y="7.672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cm" svg:height="0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0cm" svg:height="0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22.858cm" svg:height="2.384cm" svg:x="1.27cm" svg:y="0.57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cm" svg:height="0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cm" svg:height="0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22.858cm" svg:height="2.384cm" svg:x="1.27cm" svg:y="0.57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2">
        <draw:page-thumbnail presentation:style-name="Centered_20_Text-title" draw:layer="backgroundobjects" svg:width="0cm" svg:height="0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_20_and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1.154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cm" svg:height="0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Content_20_and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cm" svg:height="0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6-02T11:05:42</meta:creation-date>
    <meta:initial-creator>PptxGenJS</meta:initial-creator>
    <dc:language>ca-ES-valencia</dc:language>
    <dc:date>2026-06-02T19:33:44.222312900</dc:date>
    <meta:editing-cycles>7</meta:editing-cycles>
    <dc:subject>PptxGenJS Presentation</dc:subject>
    <dc:title>SAComercLocal — Projecte DWEC</dc:title>
    <meta:editing-duration>PT32M14S</meta:editing-duration>
    <meta:generator>LibreOffice/25.8.5.2$Windows_X86_64 LibreOffice_project/9c8b85f387cc00a89945a79c9e6239f32e450ac2</meta:generator>
    <meta:document-statistic meta:object-count="442"/>
    <meta:user-defined meta:name="AppVersion">15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